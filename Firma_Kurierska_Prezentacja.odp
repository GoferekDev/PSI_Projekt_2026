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6CCA1A42D2BBC9A08C9.png" manifest:media-type="image/png"/>
  <manifest:file-entry manifest:full-path="Pictures/1000020100000800000005A8C2C6D51B08405AB1.png" manifest:media-type="image/png"/>
  <manifest:file-entry manifest:full-path="Pictures/1000020100000250000000F70C8D5067530FD7CC.png" manifest:media-type="image/png"/>
  <manifest:file-entry manifest:full-path="Pictures/1000000000000800000005A87090E0F95005C771.jpg" manifest:media-type="image/jpeg"/>
  <manifest:file-entry manifest:full-path="Pictures/100002010000048700000356C8F3968532587C2B.png" manifest:media-type="image/png"/>
  <manifest:file-entry manifest:full-path="Pictures/1000020100000800000005A8E717AAA782EC0D7E.png" manifest:media-type="image/png"/>
  <manifest:file-entry manifest:full-path="Pictures/10000000000002800000032BCE6EE96F3470C484.jpg" manifest:media-type="image/jpeg"/>
  <manifest:file-entry manifest:full-path="Pictures/10000201000001C7000001559E6C75C4DE7A8587.png" manifest:media-type="image/png"/>
  <manifest:file-entry manifest:full-path="Pictures/1000020100000381000001FE222A2352DDA17B73.png" manifest:media-type="image/png"/>
  <manifest:file-entry manifest:full-path="Pictures/1000020100000262000001FAA2162773165FB8CD.png" manifest:media-type="image/png"/>
  <manifest:file-entry manifest:full-path="Pictures/1000020100000424000002154B6AD8C9555BD683.png" manifest:media-type="image/png"/>
  <manifest:file-entry manifest:full-path="Pictures/10000201000003800000019B92B4AA4ECCC26BD6.png" manifest:media-type="image/png"/>
  <manifest:file-entry manifest:full-path="Pictures/10000201000001F4000000D0930AF5A760BA81E7.png" manifest:media-type="image/png"/>
  <manifest:file-entry manifest:full-path="Pictures/10000201000003280000032C7BA2B2B43ABCE745.png" manifest:media-type="image/png"/>
  <manifest:file-entry manifest:full-path="Pictures/10000201000002CC0000018E4E09867CEFA83178.png" manifest:media-type="image/png"/>
  <manifest:file-entry manifest:full-path="Pictures/1000020100000383000002138D8568AE1EE2F987.png" manifest:media-type="image/png"/>
  <manifest:file-entry manifest:full-path="Pictures/10000201000005A800000800A882A2F51758C4A3.png" manifest:media-type="image/png"/>
  <manifest:file-entry manifest:full-path="Pictures/10000201000003830000026CD54E0A5C56E39DF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202729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Firma Kurierska</text:span></text:p>
          </draw:text-box>
        </draw:frame>
        <draw:frame draw:name="Google Shape;60;p13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Dokumentacja w notacji UML</text:span><text:span text:style-name="T2"><text:line-break/></text:span><text:span text:style-name="T2">Informatyka Ogólna - Grupa 2 - Wiktor Stankiewicz, Maciej Wojciechowski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zym zajmuje się System?" draw:style-name="dp1" draw:master-page-name="TITLE_5f_AND_5f_BODY" presentation:presentation-page-layout-name="AL2T1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zym zajmuje się System?</text:span></text:p>
          </draw:text-box>
        </draw:frame>
        <draw:frame draw:name="Google Shape;66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System wspomaga firmę zajmującą się dostarczaniem przesyłek na terenie całego kraju.</text:span><text:span text:style-name="T4"><text:line-break/></text:span><text:span text:style-name="T4"><text:line-break/></text:span><text:span text:style-name="T4">Do jego zadań należą:</text:span></text:p>
            <text:list text:style-name="L5">
              <text:list-item>
                <text:p text:style-name="P8"><text:span text:style-name="T4">Nadawanie przesyłek przez internet;</text:span></text:p>
              </text:list-item>
              <text:list-item>
                <text:p text:style-name="P7"><text:span text:style-name="T4">Wsparcie stałych klientów;</text:span></text:p>
              </text:list-item>
              <text:list-item>
                <text:p text:style-name="P7"><text:span text:style-name="T4">Kontrola trasy przesyłek.</text:span></text:p>
              </text:list-item>
            </text:list>
          </draw:text-box>
        </draw:frame>
        <presentation:notes draw:style-name="dp2">
          <draw:page-thumbnail draw:name="Google Shape;62;g3e48d3b9726_0_0:notes" draw:style-name="gr1" draw:layer="layout" svg:width="16.932cm" svg:height="9.524cm" svg:x="1.059cm" svg:y="1.905cm" draw:page-number="2" presentation:class="page"/>
          <draw:frame draw:name="Google Shape;63;g3e48d3b9726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k wygląda trasa przesyłki do odbiorcy?" draw:style-name="dp1" draw:master-page-name="TITLE_5f_AND_5f_BODY" presentation:presentation-page-layout-name="AL2T1"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ak wygląda trasa przesyłki do odbiorcy?</text:span></text:p>
          </draw:text-box>
        </draw:frame>
        <draw:frame draw:name="Google Shape;72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p text:style-name="P8"><text:span text:style-name="T5"/></text:p>
            <text:p text:style-name="P10"><text:span text:style-name="T5"/></text:p>
          </draw:text-box>
        </draw:frame>
        <draw:frame draw:name="Google Shape;73;p15" draw:style-name="gr2" draw:text-style-name="P11" draw:layer="layout" svg:width="13.759cm" svg:height="9.728cm" svg:x="5.82cm" svg:y="3.201cm">
          <draw:image xlink:href="Pictures/1000000000000800000005A87090E0F95005C771.jpg" xlink:type="simple" xlink:show="embed" xlink:actuate="onLoad">
            <text:p/>
          </draw:image>
        </draw:frame>
        <presentation:notes draw:style-name="dp2">
          <draw:page-thumbnail draw:name="Google Shape;68;g3e48d3b9726_0_6:notes" draw:style-name="gr1" draw:layer="layout" svg:width="16.932cm" svg:height="9.524cm" svg:x="1.059cm" svg:y="1.905cm" draw:page-number="3" presentation:class="page"/>
          <draw:frame draw:name="Google Shape;69;g3e48d3b9726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y i aktorzy biznesowi" draw:style-name="dp1" draw:master-page-name="TITLE_5f_AND_5f_BODY" presentation:presentation-page-layout-name="AL2T1">
        <draw:frame draw:name="Google Shape;78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cesy i aktorzy biznesowi</text:span></text:p>
          </draw:text-box>
        </draw:frame>
        <draw:frame draw:name="Google Shape;79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Kluczowymi Aktorami Biznesowymi Są:</text:span></text:p>
            <text:list text:style-name="L5">
              <text:list-item>
                <text:p text:style-name="P8"><text:span text:style-name="T4">Nadawca (lub Stały Nadawca)</text:span></text:p>
              </text:list-item>
              <text:list-item>
                <text:p text:style-name="P7"><text:span text:style-name="T4">Organizacja Obsługująca Płatności</text:span></text:p>
              </text:list-item>
              <text:list-item>
                <text:p text:style-name="P7"><text:span text:style-name="T4">Odbiorca</text:span></text:p>
              </text:list-item>
            </text:list>
          </draw:text-box>
        </draw:frame>
        <draw:frame draw:name="Google Shape;80;p16" draw:style-name="gr2" draw:text-style-name="P11" draw:layer="layout" svg:width="12.038cm" svg:height="9.489cm" svg:x="12.496cm" svg:y="3.201cm">
          <draw:image xlink:href="Pictures/10000201000001C7000001559E6C75C4DE7A8587.png" xlink:type="simple" xlink:show="embed" xlink:actuate="onLoad">
            <text:p/>
          </draw:image>
        </draw:frame>
        <presentation:notes draw:style-name="dp2">
          <draw:page-thumbnail draw:name="Google Shape;75;g3e48d3b9726_0_11:notes" draw:style-name="gr1" draw:layer="layout" svg:width="16.932cm" svg:height="9.524cm" svg:x="1.059cm" svg:y="1.905cm" draw:page-number="4" presentation:class="page"/>
          <draw:frame draw:name="Google Shape;76;g3e48d3b9726_0_1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sa Przesyłki" draw:style-name="dp1" draw:master-page-name="TITLE_5f_AND_5f_BODY" presentation:presentation-page-layout-name="AL2T1">
        <draw:frame draw:name="Google Shape;85;p17" presentation:style-name="pr4" draw:text-style-name="P6" draw:layer="layout" svg:width="23.667cm" svg:height="1.602cm" svg:x="0.866cm" svg:y="0.602cm" presentation:class="title" presentation:user-transformed="true">
          <draw:text-box>
            <text:p text:style-name="P5"><text:span text:style-name="T3">Trasa Przesyłki</text:span></text:p>
          </draw:text-box>
        </draw:frame>
        <draw:frame draw:name="Google Shape;86;p1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5"><text:s/></text:span></text:p>
          </draw:text-box>
        </draw:frame>
        <draw:frame draw:name="Google Shape;87;p17" draw:style-name="gr2" draw:text-style-name="P11" draw:layer="layout" svg:width="13.35cm" svg:height="11.074cm" svg:x="6.024cm" svg:y="2.409cm">
          <draw:image xlink:href="Pictures/1000020100000262000001FAA2162773165FB8CD.png" xlink:type="simple" xlink:show="embed" xlink:actuate="onLoad">
            <text:p/>
          </draw:image>
        </draw:frame>
        <presentation:notes draw:style-name="dp2">
          <draw:page-thumbnail draw:name="Google Shape;82;g3e48d3b9726_0_119:notes" draw:style-name="gr1" draw:layer="layout" svg:width="16.932cm" svg:height="9.524cm" svg:x="1.059cm" svg:y="1.905cm" draw:page-number="5" presentation:class="page"/>
          <draw:frame draw:name="Google Shape;83;g3e48d3b9726_0_11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owy Diagram Przypadków Użycia" draw:style-name="dp1" draw:master-page-name="TITLE_5f_AND_5f_BODY" presentation:presentation-page-layout-name="AL2T1">
        <draw:frame draw:name="Google Shape;92;p18" presentation:style-name="pr4" draw:text-style-name="P6" draw:layer="layout" svg:width="23.667cm" svg:height="1.49cm" svg:x="0.866cm" svg:y="0.518cm" presentation:class="title" presentation:user-transformed="true">
          <draw:text-box>
            <text:p text:style-name="P5"><text:span text:style-name="T3">Systemowy Diagram Przypadków Użycia</text:span></text:p>
          </draw:text-box>
        </draw:frame>
        <draw:frame draw:name="Google Shape;93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5"><text:s/></text:span></text:p>
          </draw:text-box>
        </draw:frame>
        <draw:frame draw:name="Google Shape;94;p18" draw:style-name="gr2" draw:text-style-name="P11" draw:layer="layout" svg:width="10.679cm" svg:height="10.731cm" svg:x="7.36cm" svg:y="2.58cm">
          <draw:image xlink:href="Pictures/10000201000003280000032C7BA2B2B43ABCE745.png" xlink:type="simple" xlink:show="embed" xlink:actuate="onLoad">
            <text:p/>
          </draw:image>
        </draw:frame>
        <presentation:notes draw:style-name="dp2">
          <draw:page-thumbnail draw:name="Google Shape;89;g3e48d3b9726_0_125:notes" draw:style-name="gr1" draw:layer="layout" svg:width="16.932cm" svg:height="9.524cm" svg:x="1.059cm" svg:y="1.905cm" draw:page-number="6" presentation:class="page"/>
          <draw:frame draw:name="Google Shape;90;g3e48d3b9726_0_12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danie Przesyłki" draw:style-name="dp1" draw:master-page-name="TITLE_5f_ONLY" presentation:presentation-page-layout-name="AL3T19">
        <draw:frame draw:name="Google Shape;99;p19" presentation:style-name="pr11" draw:text-style-name="P6" draw:layer="layout" svg:width="23.667cm" svg:height="1.502cm" svg:x="0.866cm" svg:y="0.318cm" presentation:class="title" presentation:user-transformed="true">
          <draw:text-box>
            <text:p text:style-name="P5"><text:span text:style-name="T3">Nadanie Przesyłki</text:span></text:p>
          </draw:text-box>
        </draw:frame>
        <draw:frame draw:name="Google Shape;100;p19" draw:style-name="gr2" draw:text-style-name="P11" draw:layer="layout" svg:width="10.076cm" svg:height="2.671cm" svg:x="12.7cm" svg:y="9.975cm">
          <draw:image xlink:href="Pictures/10000201000002CC0000018E4E09867CEFA83178.png" xlink:type="simple" xlink:show="embed" xlink:actuate="onLoad">
            <text:p/>
          </draw:image>
        </draw:frame>
        <draw:frame draw:name="Google Shape;101;p19" draw:style-name="gr2" draw:text-style-name="P11" draw:layer="layout" svg:width="10.076cm" svg:height="7.582cm" svg:x="12.7cm" svg:y="2.392cm">
          <draw:image xlink:href="Pictures/10000201000003830000026CD54E0A5C56E39DFC.png" xlink:type="simple" xlink:show="embed" xlink:actuate="onLoad">
            <text:p/>
          </draw:image>
        </draw:frame>
        <draw:frame draw:name="Google Shape;102;p19" draw:style-name="gr2" draw:text-style-name="P11" draw:layer="layout" svg:width="8.092cm" svg:height="10.254cm" svg:x="2.919cm" svg:y="2.392cm">
          <draw:image xlink:href="Pictures/10000000000002800000032BCE6EE96F3470C484.jpg" xlink:type="simple" xlink:show="embed" xlink:actuate="onLoad">
            <text:p/>
          </draw:image>
        </draw:frame>
        <presentation:notes draw:style-name="dp2">
          <draw:page-thumbnail draw:name="Google Shape;96;g3e48d3b9726_0_131:notes" draw:style-name="gr1" draw:layer="layout" svg:width="16.932cm" svg:height="9.524cm" svg:x="1.059cm" svg:y="1.905cm" draw:page-number="7" presentation:class="page"/>
          <draw:frame draw:name="Google Shape;97;g3e48d3b9726_0_13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Żądanie Zwrotu" draw:style-name="dp1" draw:master-page-name="TITLE_5f_ONLY" presentation:presentation-page-layout-name="AL3T19">
        <draw:frame draw:name="Google Shape;107;p20" presentation:style-name="pr11" draw:text-style-name="P6" draw:layer="layout" svg:width="23.667cm" svg:height="1.59cm" svg:x="0.866cm" svg:y="0.622cm" presentation:class="title" presentation:user-transformed="true">
          <draw:text-box>
            <text:p text:style-name="P5"><text:span text:style-name="T3">Żądanie Zwrotu</text:span></text:p>
          </draw:text-box>
        </draw:frame>
        <draw:frame draw:name="Google Shape;108;p20" draw:style-name="gr2" draw:text-style-name="P11" draw:layer="layout" svg:width="12.217cm" svg:height="4.416cm" svg:x="11.324cm" svg:y="8.643cm">
          <draw:image xlink:href="Pictures/1000020100000424000002154B6AD8C9555BD683.png" xlink:type="simple" xlink:show="embed" xlink:actuate="onLoad">
            <text:p/>
          </draw:image>
        </draw:frame>
        <draw:frame draw:name="Google Shape;109;p20" draw:style-name="gr2" draw:text-style-name="P11" draw:layer="layout" svg:width="12.217cm" svg:height="6.196cm" svg:x="11.324cm" svg:y="2.446cm">
          <draw:image xlink:href="Pictures/10000201000003800000019B92B4AA4ECCC26BD6.png" xlink:type="simple" xlink:show="embed" xlink:actuate="onLoad">
            <text:p/>
          </draw:image>
        </draw:frame>
        <draw:frame draw:name="Google Shape;110;p20" draw:style-name="gr2" draw:text-style-name="P11" draw:layer="layout" svg:width="7.503cm" svg:height="10.613cm" svg:x="1.672cm" svg:y="2.446cm">
          <draw:image xlink:href="Pictures/10000201000005A800000800A882A2F51758C4A3.png" xlink:type="simple" xlink:show="embed" xlink:actuate="onLoad">
            <text:p/>
          </draw:image>
        </draw:frame>
        <presentation:notes draw:style-name="dp2">
          <draw:page-thumbnail draw:name="Google Shape;104;g3e48d3b9726_0_139:notes" draw:style-name="gr1" draw:layer="layout" svg:width="16.932cm" svg:height="9.524cm" svg:x="1.059cm" svg:y="1.905cm" draw:page-number="8" presentation:class="page"/>
          <draw:frame draw:name="Google Shape;105;g3e48d3b9726_0_13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nto Stałego Nadawcy" draw:style-name="dp1" draw:master-page-name="TITLE_5f_AND_5f_BODY" presentation:presentation-page-layout-name="AL2T1">
        <draw:frame draw:name="Google Shape;115;p21" presentation:style-name="pr4" draw:text-style-name="P6" draw:layer="layout" svg:width="23.667cm" svg:height="1.59cm" svg:x="0.866cm" svg:y="0.77cm" presentation:class="title" presentation:user-transformed="true">
          <draw:text-box>
            <text:p text:style-name="P5"><text:span text:style-name="T3">Konto Stałego Nadawcy</text:span></text:p>
          </draw:text-box>
        </draw:frame>
        <draw:frame draw:name="Google Shape;116;p21" draw:style-name="gr2" draw:text-style-name="P11" draw:layer="layout" svg:width="12.89cm" svg:height="9.114cm" svg:x="11.643cm" svg:y="3.201cm">
          <draw:image xlink:href="Pictures/1000020100000800000005A8C2C6D51B08405AB1.png" xlink:type="simple" xlink:show="embed" xlink:actuate="onLoad">
            <text:p/>
          </draw:image>
        </draw:frame>
        <draw:frame draw:name="Google Shape;117;p21" presentation:style-name="pr5" draw:text-style-name="P9" draw:layer="layout" svg:width="23.667cm" svg:height="9.114cm" svg:x="0.866cm" svg:y="3.201cm" presentation:class="outline" presentation:user-transformed="true">
          <draw:text-box>
            <text:p text:style-name="P12"><text:span text:style-name="T4">Konto Stałego Nadawcy udostępnia </text:span><text:span text:style-name="T4"><text:line-break/></text:span><text:span text:style-name="T4">funkcje pomagające firmom, które </text:span><text:span text:style-name="T4"><text:line-break/></text:span><text:span text:style-name="T4">często korzystają z usług kurierskich </text:span><text:span text:style-name="T4"><text:line-break/></text:span><text:span text:style-name="T4">tj. Lista Zwrotów. </text:span><text:span text:style-name="T4"><text:line-break/></text:span><text:span text:style-name="T4">Konto Stałego Nadawcy </text:span><text:span text:style-name="T4"><text:line-break/></text:span><text:span text:style-name="T4">można wzbogacić w </text:span><text:span text:style-name="T4"><text:line-break/></text:span><text:span text:style-name="T4">przyszłości o dodatkowe funkcje.</text:span></text:p>
          </draw:text-box>
        </draw:frame>
        <presentation:notes draw:style-name="dp2">
          <draw:page-thumbnail draw:name="Google Shape;112;g3e48d3b9726_0_146:notes" draw:style-name="gr1" draw:layer="layout" svg:width="16.932cm" svg:height="9.524cm" svg:x="1.059cm" svg:y="1.905cm" draw:page-number="9" presentation:class="page"/>
          <draw:frame draw:name="Google Shape;113;g3e48d3b9726_0_14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kalizacja Przesyłki" draw:style-name="dp1" draw:master-page-name="TITLE_5f_AND_5f_BODY" presentation:presentation-page-layout-name="AL2T1">
        <draw:frame draw:name="Google Shape;122;p22" presentation:style-name="pr4" draw:text-style-name="P6" draw:layer="layout" svg:width="23.667cm" svg:height="1.59cm" svg:x="0.866cm" svg:y="0.707cm" presentation:class="title" presentation:user-transformed="true">
          <draw:text-box>
            <text:p text:style-name="P5"><text:span text:style-name="T3">Lokalizacja Przesyłki</text:span></text:p>
          </draw:text-box>
        </draw:frame>
        <draw:frame draw:name="Google Shape;123;p22" draw:style-name="gr2" draw:text-style-name="P11" draw:layer="layout" svg:width="9.387cm" svg:height="2.932cm" svg:x="15.146cm" svg:y="10.709cm">
          <draw:image xlink:href="Pictures/10000201000001F4000000D0930AF5A760BA81E7.png" xlink:type="simple" xlink:show="embed" xlink:actuate="onLoad">
            <text:p/>
          </draw:image>
        </draw:frame>
        <draw:frame draw:name="Google Shape;124;p22" draw:style-name="gr2" draw:text-style-name="P11" draw:layer="layout" svg:width="9.387cm" svg:height="7.679cm" svg:x="15.146cm" svg:y="3.028cm">
          <draw:image xlink:href="Pictures/1000020100000383000002138D8568AE1EE2F987.png" xlink:type="simple" xlink:show="embed" xlink:actuate="onLoad">
            <text:p/>
          </draw:image>
        </draw:frame>
        <draw:frame draw:name="Google Shape;125;p22" draw:style-name="gr2" draw:text-style-name="P11" draw:layer="layout" svg:width="12.492cm" svg:height="10.613cm" svg:x="0.866cm" svg:y="3.028cm">
          <draw:image xlink:href="Pictures/1000020100000800000006CCA1A42D2BBC9A08C9.png" xlink:type="simple" xlink:show="embed" xlink:actuate="onLoad">
            <text:p/>
          </draw:image>
        </draw:frame>
        <presentation:notes draw:style-name="dp2">
          <draw:page-thumbnail draw:name="Google Shape;119;g3e48d3b9726_0_153:notes" draw:style-name="gr1" draw:layer="layout" svg:width="16.932cm" svg:height="9.524cm" svg:x="1.059cm" svg:y="1.905cm" draw:page-number="10" presentation:class="page"/>
          <draw:frame draw:name="Google Shape;120;g3e48d3b9726_0_15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kacja Kuriera" draw:style-name="dp1" draw:master-page-name="TITLE_5f_AND_5f_BODY" presentation:presentation-page-layout-name="AL2T1">
        <draw:frame draw:name="Google Shape;130;p23" presentation:style-name="pr4" draw:text-style-name="P6" draw:layer="layout" svg:width="23.667cm" svg:height="1.59cm" svg:x="0.866cm" svg:y="0.686cm" presentation:class="title" presentation:user-transformed="true">
          <draw:text-box>
            <text:p text:style-name="P5"><text:span text:style-name="T3">Aplikacja Kuriera</text:span></text:p>
          </draw:text-box>
        </draw:frame>
        <draw:frame draw:name="Google Shape;131;p23" draw:style-name="gr2" draw:text-style-name="P11" draw:layer="layout" svg:width="12.722cm" svg:height="10.613cm" svg:x="0.866cm" svg:y="2.827cm">
          <draw:image xlink:href="Pictures/1000020100000800000005A8E717AAA782EC0D7E.png" xlink:type="simple" xlink:show="embed" xlink:actuate="onLoad">
            <text:p/>
          </draw:image>
        </draw:frame>
        <draw:frame draw:name="Google Shape;132;p23" draw:style-name="gr2" draw:text-style-name="P11" draw:layer="layout" svg:width="9.376cm" svg:height="7.417cm" svg:x="15.157cm" svg:y="2.827cm">
          <draw:image xlink:href="Pictures/1000020100000381000001FE222A2352DDA17B73.png" xlink:type="simple" xlink:show="embed" xlink:actuate="onLoad">
            <text:p/>
          </draw:image>
        </draw:frame>
        <draw:frame draw:name="Google Shape;133;p23" draw:style-name="gr2" draw:text-style-name="P11" draw:layer="layout" svg:width="9.376cm" svg:height="3.195cm" svg:x="15.157cm" svg:y="10.245cm">
          <draw:image xlink:href="Pictures/1000020100000250000000F70C8D5067530FD7CC.png" xlink:type="simple" xlink:show="embed" xlink:actuate="onLoad">
            <text:p/>
          </draw:image>
        </draw:frame>
        <presentation:notes draw:style-name="dp2">
          <draw:page-thumbnail draw:name="Google Shape;127;g3e48d3b9726_0_161:notes" draw:style-name="gr1" draw:layer="layout" svg:width="16.932cm" svg:height="9.524cm" svg:x="1.059cm" svg:y="1.905cm" draw:page-number="11" presentation:class="page"/>
          <draw:frame draw:name="Google Shape;128;g3e48d3b9726_0_16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kt Relacyjnej Bazy Danych" draw:style-name="dp1" draw:master-page-name="TITLE_5f_AND_5f_BODY" presentation:presentation-page-layout-name="AL2T1">
        <draw:frame draw:name="Google Shape;138;p24" presentation:style-name="pr4" draw:text-style-name="P6" draw:layer="layout" svg:width="23.667cm" svg:height="1.59cm" svg:x="0.866cm" svg:y="0.77cm" presentation:class="title" presentation:user-transformed="true">
          <draw:text-box>
            <text:p text:style-name="P5"><text:span text:style-name="T3">Projekt Relacyjnej Bazy Danych</text:span></text:p>
          </draw:text-box>
        </draw:frame>
        <draw:frame draw:name="Google Shape;139;p24" draw:style-name="gr2" draw:text-style-name="P11" draw:layer="layout" svg:width="17.19cm" svg:height="11.079cm" svg:x="4.104cm" svg:y="2.361cm">
          <draw:image xlink:href="Pictures/100002010000048700000356C8F3968532587C2B.png" xlink:type="simple" xlink:show="embed" xlink:actuate="onLoad">
            <text:p/>
          </draw:image>
        </draw:frame>
        <presentation:notes draw:style-name="dp2">
          <draw:page-thumbnail draw:name="Google Shape;135;g3e48d3b9726_0_169:notes" draw:style-name="gr1" draw:layer="layout" svg:width="16.932cm" svg:height="9.524cm" svg:x="1.059cm" svg:y="1.905cm" draw:page-number="12" presentation:class="page"/>
          <draw:frame draw:name="Google Shape;136;g3e48d3b9726_0_16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44;p25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5"><text:span text:style-name="T1">Koniec Prezentacji</text:span></text:p>
          </draw:text-box>
        </draw:frame>
        <draw:frame draw:name="Google Shape;145;p25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5"><text:span text:style-name="T2">Dziękujemy za uwagę</text:span></text:p>
          </draw:text-box>
        </draw:frame>
        <presentation:notes draw:style-name="dp2">
          <draw:page-thumbnail draw:name="Google Shape;141;g3e48d3b9726_0_175:notes" draw:style-name="gr1" draw:layer="layout" svg:width="16.932cm" svg:height="9.524cm" svg:x="1.059cm" svg:y="1.905cm" draw:page-number="13" presentation:class="page"/>
          <draw:frame draw:name="Google Shape;142;g3e48d3b9726_0_17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5374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537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35374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5374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9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0;p6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4"/>
    <meta:generator>LibreOfficeDev/6.0.5.2$Linux_X86_64 LibreOffice_project/</meta:generator>
  </office:meta>
</office:document-meta>
</file>