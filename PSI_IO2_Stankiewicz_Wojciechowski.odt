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Header">
      <style:text-properties fo:font-size="8pt" officeooo:rsid="00008545" officeooo:paragraph-rsid="00008545" style:font-size-asian="8pt" style:font-size-complex="8pt"/>
    </style:style>
    <style:style style:name="P4" style:family="paragraph" style:parent-style-name="Heading_20_1">
      <style:text-properties officeooo:paragraph-rsid="00008545"/>
    </style:style>
    <style:style style:name="P5" style:family="paragraph" style:parent-style-name="Heading_20_1">
      <style:paragraph-properties fo:break-before="page"/>
      <style:text-properties officeooo:paragraph-rsid="00008545"/>
    </style:style>
    <style:style style:name="P6" style:family="paragraph" style:parent-style-name="Text_20_body">
      <style:paragraph-properties fo:text-align="center" style:justify-single-word="false"/>
      <style:text-properties officeooo:rsid="00008545" officeooo:paragraph-rsid="00008545"/>
    </style:style>
    <style:style style:name="P7" style:family="paragraph" style:parent-style-name="Text_20_body">
      <style:paragraph-properties fo:text-align="center" style:justify-single-word="false"/>
      <style:text-properties officeooo:rsid="00024ff3" officeooo:paragraph-rsid="00024ff3"/>
    </style:style>
    <style:style style:name="P8" style:family="paragraph" style:parent-style-name="Title" style:master-page-name="First_20_Page">
      <style:paragraph-properties style:page-number="auto"/>
      <style:text-properties officeooo:rsid="00008545" officeooo:paragraph-rsid="00008545"/>
    </style:style>
    <style:style style:name="P9" style:family="paragraph" style:parent-style-name="Title">
      <style:text-properties officeooo:rsid="00008545" officeooo:paragraph-rsid="0000854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9"/>
      <text:p text:style-name="P9"/>
      <text:p text:style-name="P9"/>
      <text:p text:style-name="P9"/>
      <text:p text:style-name="P9"/>
      <text:p text:style-name="P9">FIRMA KURIERSKA</text:p>
      <text:p text:style-name="P6">IO 2, Wiktor Stankiewicz, Maciej Wojciechowski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1.0</text:p>
      <text:p text:style-name="P6">Projektowanie Systemów Informatycznych, Artur Samojluk</text:p>
      <text:p text:style-name="P7">UWM, Olsztyn, 27.05.2026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2">Spis treści</text:p>
          </text:index-title>
          <text:p text:style-name="P1"><text:a xlink:type="simple" xlink:href="#__RefHeading___Toc40_1083696470" text:style-name="Index_20_Link" text:visited-style-name="Index_20_Link">Analiza Biznesowa<text:tab/>2</text:a></text:p>
          <text:p text:style-name="P1"><text:a xlink:type="simple" xlink:href="#__RefHeading___Toc42_1083696470" text:style-name="Index_20_Link" text:visited-style-name="Index_20_Link">Analiza Wymagań Na SI<text:tab/>2</text:a></text:p>
          <text:p text:style-name="P1"><text:a xlink:type="simple" xlink:href="#__RefHeading___Toc44_1083696470" text:style-name="Index_20_Link" text:visited-style-name="Index_20_Link">Analiza Funkcjonalna SI<text:tab/>2</text:a></text:p>
          <text:p text:style-name="P1"><text:a xlink:type="simple" xlink:href="#__RefHeading___Toc46_1083696470" text:style-name="Index_20_Link" text:visited-style-name="Index_20_Link">Modelowanie Analityczne SI<text:tab/>2</text:a></text:p>
          <text:p text:style-name="P1"><text:a xlink:type="simple" xlink:href="#__RefHeading___Toc48_1083696470" text:style-name="Index_20_Link" text:visited-style-name="Index_20_Link">Modelowanie Danych<text:tab/>2</text:a></text:p>
          <text:p text:style-name="P1"><text:a xlink:type="simple" xlink:href="#__RefHeading___Toc50_1083696470" text:style-name="Index_20_Link" text:visited-style-name="Index_20_Link">Projektowanie Danych<text:tab/>2</text:a></text:p>
          <text:p text:style-name="P1"><text:a xlink:type="simple" xlink:href="#__RefHeading___Toc52_1083696470" text:style-name="Index_20_Link" text:visited-style-name="Index_20_Link">Projektowanie Interfejsu Użytkownika<text:tab/>2</text:a></text:p>
          <text:p text:style-name="P1"><text:a xlink:type="simple" xlink:href="#__RefHeading___Toc54_1083696470" text:style-name="Index_20_Link" text:visited-style-name="Index_20_Link">Modelowanie Dynamiki SI<text:tab/>2</text:a></text:p>
          <text:p text:style-name="P1"><text:a xlink:type="simple" xlink:href="#__RefHeading___Toc56_1083696470" text:style-name="Index_20_Link" text:visited-style-name="Index_20_Link">Praca Zespołowa<text:tab/>2</text:a></text:p>
        </text:index-body>
      </text:table-of-content>
      <text:h text:style-name="P4" text:outline-level="1" text:is-list-header="true"><text:bookmark-start text:name="__RefHeading___Toc40_1083696470"/>Analiza Biznesowa<text:bookmark-end text:name="__RefHeading___Toc40_1083696470"/></text:h>
      <text:h text:style-name="Heading_20_1" text:outline-level="1"><text:bookmark-start text:name="__RefHeading___Toc42_1083696470"/>Analiza Wymagań Na SI<text:bookmark-end text:name="__RefHeading___Toc42_1083696470"/></text:h>
      <text:h text:style-name="Heading_20_1" text:outline-level="1"><text:bookmark-start text:name="__RefHeading___Toc44_1083696470"/>Analiza Funkcjonalna SI<text:bookmark-end text:name="__RefHeading___Toc44_1083696470"/></text:h>
      <text:h text:style-name="Heading_20_1" text:outline-level="1"><text:bookmark-start text:name="__RefHeading___Toc46_1083696470"/>Modelowanie Analityczne SI<text:bookmark-end text:name="__RefHeading___Toc46_1083696470"/></text:h>
      <text:h text:style-name="Heading_20_1" text:outline-level="1"><text:bookmark-start text:name="__RefHeading___Toc48_1083696470"/>Modelowanie Danych<text:bookmark-end text:name="__RefHeading___Toc48_1083696470"/></text:h>
      <text:h text:style-name="Heading_20_1" text:outline-level="1"><text:bookmark-start text:name="__RefHeading___Toc50_1083696470"/>Projektowanie Danych<text:bookmark-end text:name="__RefHeading___Toc50_1083696470"/></text:h>
      <text:h text:style-name="Heading_20_1" text:outline-level="1"><text:bookmark-start text:name="__RefHeading___Toc52_1083696470"/>Projektowanie Interfejsu Użytkownika<text:bookmark-end text:name="__RefHeading___Toc52_1083696470"/></text:h>
      <text:h text:style-name="Heading_20_1" text:outline-level="1"><text:bookmark-start text:name="__RefHeading___Toc54_1083696470"/>Modelowanie Dynamiki SI<text:bookmark-end text:name="__RefHeading___Toc54_1083696470"/></text:h>
      <text:h text:style-name="Heading_20_1" text:outline-level="1"><text:bookmark-start text:name="__RefHeading___Toc56_1083696470"/>Praca Zespołowa<text:bookmark-end text:name="__RefHeading___Toc56_1083696470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8pt" officeooo:rsid="00008545" officeooo:paragraph-rsid="00008545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irma Kurierska, Wiktor Stankiewicz Maciej Wojciechowski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20T21:10:24.033000000</meta:creation-date>
    <dc:date>2026-05-20T21:28:16.014000000</dc:date>
    <meta:editing-duration>PT7M12S</meta:editing-duration>
    <meta:editing-cycles>1</meta:editing-cycles>
    <meta:document-statistic meta:table-count="0" meta:image-count="0" meta:object-count="0" meta:page-count="2" meta:paragraph-count="25" meta:word-count="82" meta:character-count="626" meta:non-whitespace-character-count="569"/>
    <meta:generator>LibreOffice/24.2.0.3$Windows_X86_64 LibreOffice_project/da48488a73ddd66ea24cf16bbc4f7b9c08e9bea1</meta:generator>
  </office:meta>
</office:document-meta>
</file>