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700000155C42D0125.png" manifest:media-type="image/png"/>
  <manifest:file-entry manifest:full-path="Pictures/1000000100000262000001FA8BEE88B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 style:master-page-name="First_20_Page">
      <style:paragraph-properties style:page-number="auto"/>
      <style:text-properties style:font-name="Calibri" officeooo:rsid="00008545" officeooo:paragraph-rsid="00008545"/>
    </style:style>
    <style:style style:name="P2" style:family="paragraph" style:parent-style-name="Title">
      <style:text-properties style:font-name="Calibri" officeooo:rsid="00008545" officeooo:paragraph-rsid="00008545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  <style:text-properties style:font-name="Calibri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Header">
      <style:text-properties style:font-name="Calibri" fo:font-size="8pt" officeooo:rsid="00008545" officeooo:paragraph-rsid="00008545" style:font-size-asian="8pt" style:font-size-complex="8pt"/>
    </style:style>
    <style:style style:name="P9" style:family="paragraph" style:parent-style-name="Heading_20_1">
      <style:paragraph-properties fo:line-height="115%"/>
      <style:text-properties style:font-name="Calibri" officeooo:paragraph-rsid="00008545"/>
    </style:style>
    <style:style style:name="P10" style:family="paragraph" style:parent-style-name="Heading_20_1">
      <style:paragraph-properties fo:line-height="115%"/>
      <style:text-properties style:font-name="Calibri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Calibri" fo:font-size="10pt" officeooo:rsid="0003811e" officeooo:paragraph-rsid="0003811e" style:font-size-asian="10pt" style:font-size-complex="10pt"/>
    </style:style>
    <style:style style:name="P12" style:family="paragraph" style:parent-style-name="Standard">
      <style:paragraph-properties fo:line-height="115%"/>
      <style:text-properties style:font-name="Calibri" fo:font-size="10pt" officeooo:rsid="000377db" officeooo:paragraph-rsid="0003811e" style:font-size-asian="10pt" style:font-size-complex="10pt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Calibri" fo:font-size="10pt" officeooo:rsid="000377db" officeooo:paragraph-rsid="0004c8f9" style:font-size-asian="10pt" style:font-size-complex="10pt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Calibri" fo:font-size="10pt" officeooo:rsid="000dccb3" officeooo:paragraph-rsid="0003c23b" style:font-size-asian="10pt" style:font-size-complex="10pt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Calibri" fo:font-size="10pt" fo:font-weight="bold" officeooo:rsid="00033678" officeooo:paragraph-rsid="0003811e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115%"/>
      <style:text-properties style:font-name="Calibri" fo:font-size="10pt" fo:font-weight="bold" officeooo:rsid="000377db" officeooo:paragraph-rsid="0003811e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Calibri" fo:font-size="10pt" fo:font-weight="bold" officeooo:rsid="000377db" officeooo:paragraph-rsid="0003c23b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Calibri" fo:font-size="10pt" fo:font-weight="normal" officeooo:rsid="000bd02e" officeooo:paragraph-rsid="0003811e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Calibri" fo:font-size="10pt" fo:font-weight="normal" officeooo:rsid="000bd02e" officeooo:paragraph-rsid="0003c23b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Calibri" fo:font-weight="bold" officeooo:rsid="001061d9" officeooo:paragraph-rsid="0003811e" style:font-weight-asian="bold" style:font-weight-complex="bold"/>
    </style:style>
    <style:style style:name="P21" style:family="paragraph" style:parent-style-name="Standard">
      <style:text-properties style:font-name="Calibri" fo:font-weight="bold" officeooo:rsid="001501ce" officeooo:paragraph-rsid="0003811e" style:font-weight-asian="bold" style:font-weight-complex="bold"/>
    </style:style>
    <style:style style:name="P22" style:family="paragraph" style:parent-style-name="Standard" style:list-style-name="L1">
      <style:text-properties style:font-name="Calibri" fo:font-weight="normal" officeooo:rsid="000bd02e" officeooo:paragraph-rsid="0003811e" style:font-weight-asian="normal" style:font-weight-complex="normal"/>
    </style:style>
    <style:style style:name="P23" style:family="paragraph" style:parent-style-name="Standard">
      <style:text-properties style:font-name="Calibri" fo:font-weight="normal" officeooo:rsid="000bd02e" officeooo:paragraph-rsid="0003811e" style:font-weight-asian="normal" style:font-weight-complex="normal"/>
    </style:style>
    <style:style style:name="P24" style:family="paragraph" style:parent-style-name="Standard" style:list-style-name="L1">
      <style:text-properties style:font-name="Calibri" fo:font-weight="normal" officeooo:rsid="001607e7" officeooo:paragraph-rsid="0003811e" style:font-weight-asian="normal" style:font-weight-complex="normal"/>
    </style:style>
    <style:style style:name="P25" style:family="paragraph" style:parent-style-name="Standard">
      <style:paragraph-properties fo:line-height="115%"/>
      <style:text-properties style:font-name="Calibri" officeooo:rsid="00013be6" officeooo:paragraph-rsid="0003811e"/>
    </style:style>
    <style:style style:name="P26" style:family="paragraph" style:parent-style-name="Table_20_Contents" style:list-style-name="L3">
      <style:text-properties style:font-name="Calibri" fo:font-weight="normal" officeooo:rsid="000377db" officeooo:paragraph-rsid="0003811e" style:font-weight-asian="normal" style:font-weight-complex="normal"/>
    </style:style>
    <style:style style:name="P27" style:family="paragraph" style:parent-style-name="Table_20_Contents" style:list-style-name="L3">
      <style:text-properties style:font-name="Calibri" officeooo:rsid="000377db" officeooo:paragraph-rsid="0003811e"/>
    </style:style>
    <style:style style:name="P28" style:family="paragraph" style:parent-style-name="Table_20_Contents" style:list-style-name="L3">
      <style:text-properties style:font-name="Calibri" officeooo:rsid="00048e9e" officeooo:paragraph-rsid="0003811e"/>
    </style:style>
    <style:style style:name="P29" style:family="paragraph" style:parent-style-name="Table_20_Contents" style:list-style-name="L3">
      <style:text-properties style:font-name="Calibri" officeooo:rsid="00089b32" officeooo:paragraph-rsid="0003811e"/>
    </style:style>
    <style:style style:name="P30" style:family="paragraph" style:parent-style-name="Table_20_Contents">
      <style:paragraph-properties fo:line-height="115%"/>
      <style:text-properties style:font-name="Calibri" fo:font-size="10pt" fo:font-weight="bold" officeooo:rsid="000377db" officeooo:paragraph-rsid="0003811e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line-height="115%"/>
      <style:text-properties style:font-name="Calibri" fo:font-size="10pt" officeooo:rsid="000377db" officeooo:paragraph-rsid="0003811e" style:font-size-asian="10pt" style:font-size-complex="10pt"/>
    </style:style>
    <style:style style:name="P32" style:family="paragraph" style:parent-style-name="Table_20_Contents">
      <style:paragraph-properties fo:line-height="115%"/>
      <style:text-properties style:font-name="Calibri" fo:font-size="10pt" officeooo:rsid="0005f271" officeooo:paragraph-rsid="0003811e" style:font-size-asian="10pt" style:font-size-complex="10pt"/>
    </style:style>
    <style:style style:name="P33" style:family="paragraph" style:parent-style-name="Table_20_Contents">
      <style:paragraph-properties fo:line-height="115%"/>
      <style:text-properties style:font-name="Calibri" fo:font-size="10pt" officeooo:rsid="00048e9e" officeooo:paragraph-rsid="0003811e" style:font-size-asian="10pt" style:font-size-complex="10pt"/>
    </style:style>
    <style:style style:name="P34" style:family="paragraph" style:parent-style-name="Table_20_Contents">
      <style:paragraph-properties fo:line-height="115%"/>
      <style:text-properties style:font-name="Calibri" fo:font-size="10pt" officeooo:rsid="00089b32" officeooo:paragraph-rsid="0003811e" style:font-size-asian="10pt" style:font-size-complex="10pt"/>
    </style:style>
    <style:style style:name="P35" style:family="paragraph" style:parent-style-name="Table_20_Contents">
      <style:paragraph-properties fo:line-height="115%"/>
      <style:text-properties style:font-name="Calibri" fo:font-size="10pt" officeooo:rsid="00136eed" officeooo:paragraph-rsid="0003811e" style:font-size-asian="10pt" style:font-size-complex="10pt"/>
    </style:style>
    <style:style style:name="P36" style:family="paragraph" style:parent-style-name="Table_20_Contents">
      <style:paragraph-properties fo:line-height="115%"/>
      <style:text-properties style:font-name="Calibri" fo:font-size="10pt" officeooo:paragraph-rsid="0003811e" style:font-size-asian="10pt" style:font-size-complex="10pt"/>
    </style:style>
    <style:style style:name="P37" style:family="paragraph" style:parent-style-name="Table_20_Contents">
      <style:paragraph-properties fo:line-height="115%"/>
      <style:text-properties style:font-name="Calibri" fo:font-size="10pt" officeooo:rsid="000818bc" officeooo:paragraph-rsid="000818bc" style:font-size-asian="10pt" style:font-size-complex="10pt"/>
    </style:style>
    <style:style style:name="P38" style:family="paragraph" style:parent-style-name="Text_20_body">
      <style:paragraph-properties fo:text-align="center" style:justify-single-word="false"/>
      <style:text-properties style:font-name="Calibri" officeooo:rsid="00008545" officeooo:paragraph-rsid="00008545"/>
    </style:style>
    <style:style style:name="P39" style:family="paragraph" style:parent-style-name="Text_20_body">
      <style:paragraph-properties fo:text-align="center" style:justify-single-word="false"/>
      <style:text-properties style:font-name="Calibri" officeooo:rsid="00024ff3" officeooo:paragraph-rsid="00024ff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59ed" style:font-weight-asian="normal" style:font-weight-complex="normal"/>
    </style:style>
    <style:style style:name="T4" style:family="text">
      <style:text-properties fo:font-weight="normal" officeooo:rsid="0010d9bb" style:font-weight-asian="normal" style:font-weight-complex="normal"/>
    </style:style>
    <style:style style:name="T5" style:family="text">
      <style:text-properties fo:font-weight="normal" officeooo:rsid="001ae9e8" style:font-weight-asian="normal" style:font-weight-complex="normal"/>
    </style:style>
    <style:style style:name="T6" style:family="text">
      <style:text-properties fo:font-weight="normal" officeooo:rsid="001061d9" style:font-weight-asian="normal" style:font-weight-complex="normal"/>
    </style:style>
    <style:style style:name="T7" style:family="text">
      <style:text-properties fo:font-weight="normal" officeooo:rsid="001176e0" style:font-weight-asian="normal" style:font-weight-complex="normal"/>
    </style:style>
    <style:style style:name="T8" style:family="text">
      <style:text-properties officeooo:rsid="0005f271"/>
    </style:style>
    <style:style style:name="T9" style:family="text">
      <style:text-properties officeooo:rsid="000dccb3"/>
    </style:style>
    <style:style style:name="T10" style:family="text">
      <style:text-properties officeooo:rsid="00142eb5"/>
    </style:style>
    <style:style style:name="T11" style:family="text">
      <style:text-properties officeooo:rsid="00048e9e"/>
    </style:style>
    <style:style style:name="T12" style:family="text">
      <style:text-properties officeooo:rsid="00089b32"/>
    </style:style>
    <style:style style:name="T13" style:family="text">
      <style:text-properties officeooo:rsid="00179ca6"/>
    </style:style>
    <style:style style:name="T14" style:family="text">
      <style:text-properties officeooo:rsid="001bd6ef"/>
    </style:style>
    <style:style style:name="T15" style:family="text">
      <style:text-properties officeooo:rsid="0019709a"/>
    </style:style>
    <style:style style:name="T16" style:family="text">
      <style:text-properties officeooo:rsid="001061d9"/>
    </style:style>
    <style:style style:name="T17" style:family="text">
      <style:text-properties officeooo:rsid="001607e7"/>
    </style:style>
    <style:style style:name="T18" style:family="text">
      <style:text-properties officeooo:rsid="0003811e"/>
    </style:style>
    <style:style style:name="T19" style:family="text">
      <style:text-properties officeooo:rsid="000818b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Diagram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>FIRMA KURIERSKA</text:p>
      <text:p text:style-name="P38">IO 2, Wiktor Stankiewicz, Maciej Wojciechowski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v1.0</text:p>
      <text:p text:style-name="P38">Projektowanie Systemów Informatycznych, Artur Samojluk</text:p>
      <text:p text:style-name="P39">UWM, Olsztyn, 27.05.2026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6">Spis treści</text:p>
          </text:index-title>
          <text:p text:style-name="P3"><text:a xlink:type="simple" xlink:href="#__RefHeading___Toc40_1083696470" text:style-name="Index_20_Link" text:visited-style-name="Index_20_Link">Analiza Biznesowa<text:tab/>2</text:a></text:p>
          <text:p text:style-name="P3"><text:a xlink:type="simple" xlink:href="#__RefHeading___Toc42_1083696470" text:style-name="Index_20_Link" text:visited-style-name="Index_20_Link">Analiza Wymagań Na SI<text:tab/>4</text:a></text:p>
          <text:p text:style-name="P3"><text:a xlink:type="simple" xlink:href="#__RefHeading___Toc44_1083696470" text:style-name="Index_20_Link" text:visited-style-name="Index_20_Link">Analiza Funkcjonalna SI<text:tab/>4</text:a></text:p>
          <text:p text:style-name="P3"><text:a xlink:type="simple" xlink:href="#__RefHeading___Toc46_1083696470" text:style-name="Index_20_Link" text:visited-style-name="Index_20_Link">Modelowanie Analityczne SI<text:tab/>4</text:a></text:p>
          <text:p text:style-name="P3"><text:a xlink:type="simple" xlink:href="#__RefHeading___Toc48_1083696470" text:style-name="Index_20_Link" text:visited-style-name="Index_20_Link">Modelowanie Danych<text:tab/>4</text:a></text:p>
          <text:p text:style-name="P3"><text:a xlink:type="simple" xlink:href="#__RefHeading___Toc50_1083696470" text:style-name="Index_20_Link" text:visited-style-name="Index_20_Link">Projektowanie Danych<text:tab/>4</text:a></text:p>
          <text:p text:style-name="P3"><text:a xlink:type="simple" xlink:href="#__RefHeading___Toc52_1083696470" text:style-name="Index_20_Link" text:visited-style-name="Index_20_Link">Projektowanie Interfejsu Użytkownika<text:tab/>4</text:a></text:p>
          <text:p text:style-name="P3"><text:a xlink:type="simple" xlink:href="#__RefHeading___Toc54_1083696470" text:style-name="Index_20_Link" text:visited-style-name="Index_20_Link">Modelowanie Dynamiki SI<text:tab/>4</text:a></text:p>
          <text:p text:style-name="P3"><text:a xlink:type="simple" xlink:href="#__RefHeading___Toc56_1083696470" text:style-name="Index_20_Link" text:visited-style-name="Index_20_Link">Praca Zespołowa<text:tab/>4</text:a></text:p>
        </text:index-body>
      </text:table-of-content>
      <text:illustration-index text:style-name="Sect1" text:protected="true" text:name="Wykaz rysunków1">
        <text:illustration-index-source text:caption-sequence-name="Diagram" text:caption-sequence-format="text">
          <text:index-title-template text:style-name="Figure_20_Index_20_Heading">Spis Diagramów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Wykaz rysunków1_Head">
            <text:p text:style-name="Figure_20_Index_20_Heading">Spis Diagramów</text:p>
          </text:index-title>
          <text:p text:style-name="P7"><text:a xlink:type="simple" xlink:href="#Diagram!1%7Csequence" text:style-name="Index_20_Link" text:visited-style-name="Index_20_Link">Diagram 1: Kontekst Biznesowy Firmy Kurierskiej<text:tab/>3</text:a></text:p>
          <text:p text:style-name="P7"><text:a xlink:type="simple" xlink:href="#Diagram!0%7Csequence" text:style-name="Index_20_Link" text:visited-style-name="Index_20_Link">Diagram 2: Trasa Przesyłki<text:tab/>4</text:a></text:p>
        </text:index-body>
      </text:illustration-index>
      <text:h text:style-name="P9" text:outline-level="1" text:is-list-header="true"><text:bookmark-start text:name="__RefHeading___Toc40_1083696470"/>Analiza Biznesowa<text:bookmark-end text:name="__RefHeading___Toc40_1083696470"/></text:h>
      <text:p text:style-name="P11"><text:span text:style-name="T1">Organizacja: </text:span><text:span text:style-name="T2">Firma kurierska działająca na terenie całego kraju.</text:span></text:p>
      <text:p text:style-name="P11"><text:span text:style-name="T2"/></text:p>
      <text:p text:style-name="P11"><text:span text:style-name="T1">Dziedzina Problemowa: </text:span><text:span text:style-name="T2">Obsługa wysyłania przez klientów przesyłek kurierskich oraz kontrola ich trasy.</text:span></text:p>
      <text:p text:style-name="P15">Kontekst <text:span text:style-name="T18">D</text:span>ziedziny <text:span text:style-name="T18">P</text:span>roblemowej<text:span text:style-name="T2">: </text:span><text:span text:style-name="T3">Nadawca za pośrednictwem strony zamawia dostarczenie paczki. Po dokonaniu płatności przez internet zamówienie zostaje dodane do </text:span><text:span text:style-name="T4">rejestru przesyłek </text:span><text:span text:style-name="T5">a nadawca otrzymuje plik zawierający etykietę do wydrukowania i naklejenia na paczkę</text:span><text:span text:style-name="T3">. </text:span><text:span text:style-name="T6">Poprzez specjalną aplikację kurier otrzymuje to zlecenie na liście paczek do odebrania. Po odbiorze, </text:span><text:span text:style-name="T4">zmienia on jej status w systemie</text:span><text:span text:style-name="T6"> po czym zawozi ją do sortowni. Tam </text:span><text:span text:style-name="T4">jej status zostaje zmieniony ponownie</text:span><text:span text:style-name="T6">, po czym wyrusza w trasę. Gdy kurier doręczy przesyłkę, </text:span><text:span text:style-name="T4">kolejny raz zmienia on jej status w rejestrze przesyłek. Nadawcą może być osoba prywatna lub firma. Nadawca który zamierza regularnie nadawać przesyłki może założyć konto stałego nadawcy ułatwiające ten proces. Odbiorca może zażądać zwrotu przesyłki </text:span><text:span text:style-name="T7">do nadawcy</text:span><text:span text:style-name="T4">.</text:span></text:p>
      <text:p text:style-name="P15"><text:span text:style-name="T2"/></text:p>
      <text:p text:style-name="P15">Regulacje prawne<text:span text:style-name="T2">: Ustawa Prawo przedsiębiorców, Ustawa o podatku od towarów i usług, Ustawa o ochronie danych osobowych</text:span></text:p>
      <text:p text:style-name="P15"><text:span text:style-name="T2"/></text:p>
      <text:p text:style-name="P13"><text:span text:style-name="T1">Cel wytworzenia systemu informatycznego</text:span><text:span text:style-name="T2">: Umożliwienie klientom łatwego nadawania przesyłek za pomocą strony internetowej lub aplikacji.</text:span></text:p>
      <text:p text:style-name="P15"><text:span text:style-name="T2"/></text:p>
      <text:p text:style-name="P17">Słownik<text:span text:style-name="T2">:</text:span></text:p>
      <text:p text:style-name="P19">Nadawca – <text:span text:style-name="T16">Firma lub osoba prywatna nadająca daną przesyłkę.</text:span></text:p>
      <text:p text:style-name="P19">Odbiorca – <text:span text:style-name="T16">Firma lub osoba prywatna odbierająca daną przesyłkę.</text:span></text:p>
      <text:p text:style-name="P19">Organizacja obsługująca płatności – <text:span text:style-name="T17">Bank lub inna firma która obsługuje wybraną przez nadawcę formę płatności.</text:span></text:p>
      <text:p text:style-name="P19"><text:span text:style-name="T19">Stały Nadawca</text:span> – <text:span text:style-name="T16">Firma lub osoba prywatna która regularnie nadaje przesyłki poprzez firmę kurierską </text:span><text:span text:style-name="T17">i zakłada w tym celu konto stałego nadawcy.</text:span></text:p>
      <text:p text:style-name="P14"><text:span text:style-name="T2">Rejestr przesyłek – </text:span><text:span text:style-name="T6">Baza danych zawierająca informacje o przesyłkach nadanych za pomocą systemu.</text:span></text:p>
      <text:p text:style-name="P25"/>
      <text:p text:style-name="P16">Procesy i aktorzy biznesowi<text:span text:style-name="T2">:</text:span></text:p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30">Proces</text:p>
          </table:table-cell>
          <table:table-cell table:style-name="Tabela1.A1" office:value-type="string">
            <text:p text:style-name="P30">Aktor biznesowy</text:p>
          </table:table-cell>
          <table:table-cell table:style-name="Tabela1.A1" office:value-type="string">
            <text:p text:style-name="P30">Funkcje/Zadania</text:p>
          </table:table-cell>
          <table:table-cell table:style-name="Tabela1.D1" office:value-type="string">
            <text:p text:style-name="P30">Dane</text:p>
          </table:table-cell>
        </table:table-row>
        <table:table-row>
          <table:table-cell table:style-name="Tabela1.A2" office:value-type="string">
            <text:p text:style-name="P30">Co się dzieje?</text:p>
          </table:table-cell>
          <table:table-cell table:style-name="Tabela1.A2" office:value-type="string">
            <text:p text:style-name="P30">Kto uczestniczy spoza organizacji?</text:p>
          </table:table-cell>
          <table:table-cell table:style-name="Tabela1.A2" office:value-type="string">
            <text:p text:style-name="P30">Jakie czynności są wykonywane?</text:p>
          </table:table-cell>
          <table:table-cell table:style-name="Tabela1.D2" office:value-type="string">
            <text:p text:style-name="P30">Jakie dane?</text:p>
          </table:table-cell>
        </table:table-row>
        <text:soft-page-break/>
        <table:table-row>
          <table:table-cell table:style-name="Tabela1.A2" office:value-type="string">
            <text:p text:style-name="P31">Nadanie paczki</text:p>
          </table:table-cell>
          <table:table-cell table:style-name="Tabela1.A2" office:value-type="string">
            <text:p text:style-name="P31">Nadawca, Odbiorca</text:p>
          </table:table-cell>
          <table:table-cell table:style-name="Tabela1.A2" office:value-type="string">
            <text:p text:style-name="P36">- <text:span text:style-name="T8">Zebranie danych o paczce, nadawcy, i odbiorcy</text:span></text:p>
            <text:p text:style-name="P32">- Dodanie zlecenia do <text:span text:style-name="T9">rejestru przesyłek</text:span></text:p>
            <text:p text:style-name="P32">- <text:span text:style-name="T10">Nadawca otrzymuje plik z etykietą do wydrukowania i naklejenia na przesyłkę</text:span></text:p>
          </table:table-cell>
          <table:table-cell table:style-name="Tabela1.D2" office:value-type="string">
            <text:p text:style-name="P32">Dane osobowe nadawcy, dane o przesyłce, adres odbiorcy</text:p>
          </table:table-cell>
        </table:table-row>
        <table:table-row>
          <table:table-cell table:style-name="Tabela1.A2" office:value-type="string">
            <text:p text:style-name="P31">Obsługa płatności</text:p>
          </table:table-cell>
          <table:table-cell table:style-name="Tabela1.A2" office:value-type="string">
            <text:p text:style-name="P33">Nadawca, Organizacja obsługująca płatności</text:p>
          </table:table-cell>
          <table:table-cell table:style-name="Tabela1.A2" office:value-type="string">
            <text:p text:style-name="P36">- <text:span text:style-name="T8">Nadawca dokonuje płatności za nadanie przesyłki za pomocą wybranego sposobu</text:span></text:p>
          </table:table-cell>
          <table:table-cell table:style-name="Tabela1.D2" office:value-type="string">
            <text:p text:style-name="P32">Dane płatności</text:p>
          </table:table-cell>
        </table:table-row>
        <table:table-row>
          <table:table-cell table:style-name="Tabela1.A2" office:value-type="string">
            <text:p text:style-name="P31">Rejestracja <text:span text:style-name="T11">konta</text:span> stałego nadawcy</text:p>
          </table:table-cell>
          <table:table-cell table:style-name="Tabela1.A2" office:value-type="string">
            <text:p text:style-name="P37">Stały Nadawca</text:p>
          </table:table-cell>
          <table:table-cell table:style-name="Tabela1.A2" office:value-type="string">
            <text:p text:style-name="P36">- <text:span text:style-name="T12">Stworzenie konta w bazie danych</text:span></text:p>
          </table:table-cell>
          <table:table-cell table:style-name="Tabela1.D2" office:value-type="string">
            <text:p text:style-name="P34">Dane firmy</text:p>
          </table:table-cell>
        </table:table-row>
        <table:table-row>
          <table:table-cell table:style-name="Tabela1.A2" office:value-type="string">
            <text:p text:style-name="P33">Śledzenie <text:span text:style-name="T9">paczki</text:span></text:p>
          </table:table-cell>
          <table:table-cell table:style-name="Tabela1.A2" office:value-type="string">
            <text:p text:style-name="P33">Odbiorca</text:p>
          </table:table-cell>
          <table:table-cell table:style-name="Tabela1.A2" office:value-type="string">
            <text:p text:style-name="P36">- <text:span text:style-name="T13">Otrzymanie przez odbiorcę informacji o danej paczce</text:span></text:p>
          </table:table-cell>
          <table:table-cell table:style-name="Tabela1.D2" office:value-type="string">
            <text:p text:style-name="P34">Dane paczki</text:p>
          </table:table-cell>
        </table:table-row>
        <table:table-row>
          <table:table-cell table:style-name="Tabela1.A2" office:value-type="string">
            <text:p text:style-name="P33">Zwrot przesyłki</text:p>
          </table:table-cell>
          <table:table-cell table:style-name="Tabela1.A2" office:value-type="string">
            <text:p text:style-name="P33">Odbiorca, Nadawca</text:p>
          </table:table-cell>
          <table:table-cell table:style-name="Tabela1.A2" office:value-type="string">
            <text:p text:style-name="P36">- <text:span text:style-name="T14">Wypełnienie formularza zwrotu</text:span></text:p>
            <text:p text:style-name="P36">- <text:span text:style-name="T14">Nastąpienie reszty procesu zwykłego nadania paczki, ale z zamienionymi danymi nadawcy i odbiorcy</text:span></text:p>
          </table:table-cell>
          <table:table-cell table:style-name="Tabela1.D2" office:value-type="string">
            <text:p text:style-name="P35">Dane odbiorcy (zwracającego), formularz zwrotu, dane nadawcy</text:p>
          </table:table-cell>
        </table:table-row>
        <table:table-row>
          <table:table-cell table:style-name="Tabela1.A2" office:value-type="string">
            <text:p text:style-name="P34">Potwierdzenie <text:span text:style-name="T9">doręczenia</text:span> paczki</text:p>
          </table:table-cell>
          <table:table-cell table:style-name="Tabela1.A2" office:value-type="string">
            <text:p text:style-name="P34">Odbiorca (opcjonalnie), <text:span text:style-name="T15">Organizacja obsługująca płatności (opcjonalne)</text:span></text:p>
          </table:table-cell>
          <table:table-cell table:style-name="Tabela1.A2" office:value-type="string">
            <text:p text:style-name="P36">- <text:span text:style-name="T15">Oznaczenie paczki w systemie jako „Doręczona”.</text:span></text:p>
            <text:p text:style-name="P36">- <text:span text:style-name="T15">(Opcjonalne) Zebranie podpisu odbiorcy</text:span></text:p>
            <text:p text:style-name="P36">- <text:span text:style-name="T15">(Opcjonalne) Opłata za paczkę za pobraniem</text:span></text:p>
          </table:table-cell>
          <table:table-cell table:style-name="Tabela1.D2" office:value-type="string">
            <text:p text:style-name="P34">Dane paczki, podpis odbiorcy, <text:span text:style-name="T15">dane płatności</text:span></text:p>
          </table:table-cell>
        </table:table-row>
      </table:table>
      <text:p text:style-name="P12"><text:span text:style-name="T2"/></text:p>
      <text:p text:style-name="P12"><draw:frame draw:style-name="fr1" draw:name="Ramka2" text:anchor-type="char" svg:x="2.468cm" svg:y="0.069cm" svg:width="12.039cm" draw:z-index="0"><draw:text-box fo:min-height="9.022cm"><text:p text:style-name="Diagram"><draw:frame draw:style-name="fr3" draw:name="Obraz2" text:anchor-type="paragraph" svg:x="0cm" svg:y="0cm" svg:width="12.039cm" style:rel-width="100%" svg:height="9.022cm" style:rel-height="scale" draw:z-index="1"><draw:image xlink:href="Pictures/10000001000001C700000155C42D0125.png" xlink:type="simple" xlink:show="embed" xlink:actuate="onLoad" draw:mime-type="image/png"/></draw:frame>Diagram <text:sequence text:ref-name="refDiagram1" text:name="Diagram" text:formula="ooow:Diagram+1" style:num-format="1">1</text:sequence>: Kontekst Biznesowy Firmy Kurierskiej</text:p></draw:text-box></draw:frame><text:span text:style-name="T2"/></text:p>
      <text:h text:style-name="P10" text:outline-level="1"><draw:frame draw:style-name="fr1" draw:name="Ramka1" text:anchor-type="char" svg:x="1.198cm" svg:y="0.069cm" svg:width="14.951cm" draw:z-index="2"><draw:text-box fo:min-height="10.961cm"><text:p text:style-name="Diagram"><draw:frame draw:style-name="fr2" draw:name="Obraz1" text:anchor-type="paragraph" svg:width="14.951cm" style:rel-width="100%" svg:height="10.961cm" style:rel-height="scale" draw:z-index="3"><draw:image xlink:href="Pictures/1000000100000262000001FA8BEE88BD.png" xlink:type="simple" xlink:show="embed" xlink:actuate="onLoad" draw:mime-type="image/png"/></draw:frame>Diagram <text:sequence text:ref-name="refDiagram0" text:name="Diagram" text:formula="ooow:Diagram+1" style:num-format="1">2</text:sequence>: Trasa Przesyłki</text:p></draw:text-box></draw:frame><text:soft-page-break/></text:h>
      <text:h text:style-name="P10" text:outline-level="1"><text:bookmark-start text:name="__RefHeading___Toc42_1083696470"/>Analiza Wymagań Na SI<text:bookmark-end text:name="__RefHeading___Toc42_1083696470"/></text:h>
      <text:h text:style-name="P10" text:outline-level="1"><text:bookmark-start text:name="__RefHeading___Toc44_1083696470"/>Analiza Funkcjonalna SI<text:bookmark-end text:name="__RefHeading___Toc44_1083696470"/></text:h>
      <text:h text:style-name="P10" text:outline-level="1"><text:bookmark-start text:name="__RefHeading___Toc46_1083696470"/>Modelowanie Analityczne SI<text:bookmark-end text:name="__RefHeading___Toc46_1083696470"/></text:h>
      <text:h text:style-name="P10" text:outline-level="1"><text:bookmark-start text:name="__RefHeading___Toc48_1083696470"/>Modelowanie Danych<text:bookmark-end text:name="__RefHeading___Toc48_1083696470"/></text:h>
      <text:h text:style-name="P10" text:outline-level="1"><text:bookmark-start text:name="__RefHeading___Toc50_1083696470"/>Projektowanie Danych<text:bookmark-end text:name="__RefHeading___Toc50_1083696470"/></text:h>
      <text:h text:style-name="P10" text:outline-level="1"><text:bookmark-start text:name="__RefHeading___Toc52_1083696470"/>Projektowanie Interfejsu Użytkownika<text:bookmark-end text:name="__RefHeading___Toc52_1083696470"/></text:h>
      <text:h text:style-name="P10" text:outline-level="1"><text:bookmark-start text:name="__RefHeading___Toc54_1083696470"/>Modelowanie Dynamiki SI<text:bookmark-end text:name="__RefHeading___Toc54_1083696470"/></text:h>
      <text:h text:style-name="P10" text:outline-level="1"><text:bookmark-start text:name="__RefHeading___Toc56_1083696470"/>Praca Zespołowa<text:bookmark-end text:name="__RefHeading___Toc56_1083696470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iagram" style:family="paragraph" style:parent-style-name="Caption"/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Calibri" fo:font-size="8pt" officeooo:rsid="00008545" officeooo:paragraph-rsid="00008545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irma Kurierska, Wiktor Stankiewicz Maciej Wojciechowski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20T21:10:24.033000000</meta:creation-date>
    <dc:date>2026-05-23T17:04:03.706000000</dc:date>
    <meta:editing-duration>PT53M59S</meta:editing-duration>
    <meta:editing-cycles>10</meta:editing-cycles>
    <meta:generator>LibreOffice/24.2.0.3$Windows_X86_64 LibreOffice_project/da48488a73ddd66ea24cf16bbc4f7b9c08e9bea1</meta:generator>
    <meta:document-statistic meta:table-count="1" meta:image-count="2" meta:object-count="0" meta:page-count="4" meta:paragraph-count="79" meta:word-count="502" meta:character-count="3707" meta:non-whitespace-character-count="3279"/>
  </office:meta>
</office:document-meta>
</file>