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155C42D0125.png" manifest:media-type="image/png"/>
  <manifest:file-entry manifest:full-path="Pictures/1000000100000262000001FA8BEE88BD.png" manifest:media-type="image/png"/>
  <manifest:file-entry manifest:full-path="Pictures/10000001000003280000032C0B10DB8C.png" manifest:media-type="image/png"/>
  <manifest:file-entry manifest:full-path="Pictures/1000000100000126000001F6057DDEB0.png" manifest:media-type="image/png"/>
  <manifest:file-entry manifest:full-path="Pictures/10000001000002CC0000018E71F71248.png" manifest:media-type="image/png"/>
  <manifest:file-entry manifest:full-path="Pictures/100000010000028C00000168DC5D3339.png" manifest:media-type="image/png"/>
  <manifest:file-entry manifest:full-path="Pictures/100000010000034100000153B14264D6.png" manifest:media-type="image/png"/>
  <manifest:file-entry manifest:full-path="Pictures/10000001000001F6000000F70058F0D5.png" manifest:media-type="image/png"/>
  <manifest:file-entry manifest:full-path="Pictures/10000001000002CF0000011BA2E60FD2.png" manifest:media-type="image/png"/>
  <manifest:file-entry manifest:full-path="Pictures/10000001000001F4000000D074F58F28.png" manifest:media-type="image/png"/>
  <manifest:file-entry manifest:full-path="Pictures/1000000100000424000002153C9839EB.png" manifest:media-type="image/png"/>
  <manifest:file-entry manifest:full-path="Pictures/10000001000002180000009C70CA151F.png" manifest:media-type="image/png"/>
  <manifest:file-entry manifest:full-path="Pictures/10000001000003950000025794DB9A75.png" manifest:media-type="image/png"/>
  <manifest:file-entry manifest:full-path="Pictures/100000010000038A000001CE3E5D7AFC.png" manifest:media-type="image/png"/>
  <manifest:file-entry manifest:full-path="Pictures/10000001000001F00000013EAF96B871.png" manifest:media-type="image/png"/>
  <manifest:file-entry manifest:full-path="Pictures/1000000100000339000001A1B53C8E30.png" manifest:media-type="image/png"/>
  <manifest:file-entry manifest:full-path="Pictures/100000010000026F000000EA71BBA80D.png" manifest:media-type="image/png"/>
  <manifest:file-entry manifest:full-path="Pictures/10000001000001E1000000ECDCBF93C2.png" manifest:media-type="image/png"/>
  <manifest:file-entry manifest:full-path="Pictures/10000001000005C50000044F85045596.png" manifest:media-type="image/png"/>
  <manifest:file-entry manifest:full-path="Pictures/1000000100000250000000F7CCA5C8B4.png" manifest:media-type="image/png"/>
  <manifest:file-entry manifest:full-path="Pictures/100000010000026E0000013C05B55F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91cm" style:rel-column-width="9988*"/>
    </style:style>
    <style:style style:name="Tabela2.B" style:family="table-column">
      <style:table-column-properties style:column-width="14.409cm" style:rel-column-width="5554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1.254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1cm" style:rel-column-width="9988*"/>
    </style:style>
    <style:style style:name="Tabela3.B" style:family="table-column">
      <style:table-column-properties style:column-width="14.409cm" style:rel-column-width="5554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10" style:family="table-row">
      <style:table-row-properties style:min-row-height="1.25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1cm" style:rel-column-width="9988*"/>
    </style:style>
    <style:style style:name="Tabela4.B" style:family="table-column">
      <style:table-column-properties style:column-width="14.409cm" style:rel-column-width="5554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10" style:family="table-row">
      <style:table-row-properties style:min-row-height="1.254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91cm" style:rel-column-width="9988*"/>
    </style:style>
    <style:style style:name="Tabela5.B" style:family="table-column">
      <style:table-column-properties style:column-width="14.409cm" style:rel-column-width="5554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10" style:family="table-row">
      <style:table-row-properties style:min-row-height="1.254cm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589cm" style:rel-column-width="9981*"/>
    </style:style>
    <style:style style:name="Tabela15.B" style:family="table-column">
      <style:table-column-properties style:column-width="14.411cm" style:rel-column-width="55554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10" style:family="table-row">
      <style:table-row-properties style:min-row-height="1.254cm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591cm" style:rel-column-width="9988*"/>
    </style:style>
    <style:style style:name="Tabela16.B" style:family="table-column">
      <style:table-column-properties style:column-width="14.409cm" style:rel-column-width="55547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B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.5" style:family="table-row">
      <style:table-row-properties style:min-row-height="0.704cm"/>
    </style:style>
    <style:style style:name="Tabela16.10" style:family="table-row">
      <style:table-row-properties style:min-row-height="1.254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91cm" style:rel-column-width="9988*"/>
    </style:style>
    <style:style style:name="Tabela6.B" style:family="table-column">
      <style:table-column-properties style:column-width="14.409cm" style:rel-column-width="5554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10" style:family="table-row">
      <style:table-row-properties style:min-row-height="1.254cm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91cm" style:rel-column-width="9988*"/>
    </style:style>
    <style:style style:name="Tabela7.B" style:family="table-column">
      <style:table-column-properties style:column-width="14.409cm" style:rel-column-width="5554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10" style:family="table-row">
      <style:table-row-properties style:min-row-height="1.254cm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591cm" style:rel-column-width="9988*"/>
    </style:style>
    <style:style style:name="Tabela8.B" style:family="table-column">
      <style:table-column-properties style:column-width="14.409cm" style:rel-column-width="55547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10" style:family="table-row">
      <style:table-row-properties style:min-row-height="1.254cm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591cm" style:rel-column-width="9988*"/>
    </style:style>
    <style:style style:name="Tabela9.B" style:family="table-column">
      <style:table-column-properties style:column-width="14.409cm" style:rel-column-width="5554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.10" style:family="table-row">
      <style:table-row-properties style:min-row-height="1.254cm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588cm" style:rel-column-width="9975*"/>
    </style:style>
    <style:style style:name="Tabela10.B" style:family="table-column">
      <style:table-column-properties style:column-width="14.413cm" style:rel-column-width="55560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.10" style:family="table-row">
      <style:table-row-properties style:min-row-height="1.254cm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591cm" style:rel-column-width="9988*"/>
    </style:style>
    <style:style style:name="Tabela11.B" style:family="table-column">
      <style:table-column-properties style:column-width="14.409cm" style:rel-column-width="55547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.10" style:family="table-row">
      <style:table-row-properties style:min-row-height="1.254cm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591cm" style:rel-column-width="9988*"/>
    </style:style>
    <style:style style:name="Tabela13.B" style:family="table-column">
      <style:table-column-properties style:column-width="14.409cm" style:rel-column-width="55547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10" style:family="table-row">
      <style:table-row-properties style:min-row-height="1.254cm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591cm" style:rel-column-width="9988*"/>
    </style:style>
    <style:style style:name="Tabela14.B" style:family="table-column">
      <style:table-column-properties style:column-width="14.409cm" style:rel-column-width="55547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B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.10" style:family="table-row">
      <style:table-row-properties style:min-row-height="1.254cm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591cm" style:rel-column-width="9988*"/>
    </style:style>
    <style:style style:name="Tabela12.B" style:family="table-column">
      <style:table-column-properties style:column-width="14.409cm" style:rel-column-width="55547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10" style:family="table-row">
      <style:table-row-properties style:min-row-height="1.254cm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591cm" style:rel-column-width="9988*"/>
    </style:style>
    <style:style style:name="Tabela17.B" style:family="table-column">
      <style:table-column-properties style:column-width="14.409cm" style:rel-column-width="55547*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7.B1" style:family="table-cell">
      <style:table-cell-properties fo:padding="0.097cm" fo:border="0.5pt solid #000000"/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7.10" style:family="table-row">
      <style:table-row-properties style:min-row-height="1.254cm"/>
    </style:style>
    <style:style style:name="P1" style:family="paragraph" style:parent-style-name="Header">
      <style:text-properties style:font-name="Calibri" fo:font-size="8pt" officeooo:rsid="00008545" officeooo:paragraph-rsid="00008545" style:font-size-asian="8pt" style:font-size-complex="8pt"/>
    </style:style>
    <style:style style:name="P2" style:family="paragraph" style:parent-style-name="Title">
      <style:text-properties style:font-name="Calibri" officeooo:rsid="00008545" officeooo:paragraph-rsid="00008545"/>
    </style:style>
    <style:style style:name="P3" style:family="paragraph" style:parent-style-name="Text_20_body">
      <style:paragraph-properties fo:text-align="center" style:justify-single-word="false"/>
      <style:text-properties style:font-name="Calibri" officeooo:rsid="00008545" officeooo:paragraph-rsid="00008545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alibri" fo:font-size="10pt" officeooo:rsid="0003811e" officeooo:paragraph-rsid="0003811e" style:font-size-asian="10pt" style:font-size-complex="10pt"/>
    </style:style>
    <style:style style:name="P5" style:family="paragraph" style:parent-style-name="Table_20_Contents">
      <style:paragraph-properties fo:line-height="115%"/>
      <style:text-properties style:font-name="Calibri" fo:font-size="10pt" officeooo:rsid="000377db" officeooo:paragraph-rsid="0003811e" style:font-size-asian="10pt" style:font-size-complex="10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libri" fo:font-size="10pt" officeooo:rsid="000377db" officeooo:paragraph-rsid="0004c8f9" style:font-size-asian="10pt" style:font-size-complex="10pt"/>
    </style:style>
    <style:style style:name="P7" style:family="paragraph" style:parent-style-name="Table_20_Contents">
      <style:paragraph-properties fo:line-height="115%"/>
      <style:text-properties style:font-name="Calibri" fo:font-size="10pt" officeooo:rsid="0005f271" officeooo:paragraph-rsid="0003811e" style:font-size-asian="10pt" style:font-size-complex="10pt"/>
    </style:style>
    <style:style style:name="P8" style:family="paragraph" style:parent-style-name="Table_20_Contents">
      <style:paragraph-properties fo:line-height="115%"/>
      <style:text-properties style:font-name="Calibri" fo:font-size="10pt" officeooo:rsid="00048e9e" officeooo:paragraph-rsid="0003811e" style:font-size-asian="10pt" style:font-size-complex="10pt"/>
    </style:style>
    <style:style style:name="P9" style:family="paragraph" style:parent-style-name="Table_20_Contents">
      <style:paragraph-properties fo:line-height="115%"/>
      <style:text-properties style:font-name="Calibri" fo:font-size="10pt" officeooo:rsid="00089b32" officeooo:paragraph-rsid="0003811e" style:font-size-asian="10pt" style:font-size-complex="10pt"/>
    </style:style>
    <style:style style:name="P10" style:family="paragraph" style:parent-style-name="Table_20_Contents">
      <style:paragraph-properties fo:line-height="115%"/>
      <style:text-properties style:font-name="Calibri" fo:font-size="10pt" officeooo:rsid="00136eed" officeooo:paragraph-rsid="0003811e" style:font-size-asian="10pt" style:font-size-complex="10pt"/>
    </style:style>
    <style:style style:name="P11" style:family="paragraph" style:parent-style-name="Table_20_Contents">
      <style:paragraph-properties fo:line-height="115%"/>
      <style:text-properties style:font-name="Calibri" fo:font-size="10pt" officeooo:paragraph-rsid="0003811e" style:font-size-asian="10pt" style:font-size-complex="10pt"/>
    </style:style>
    <style:style style:name="P12" style:family="paragraph" style:parent-style-name="Table_20_Contents">
      <style:paragraph-properties fo:line-height="115%"/>
      <style:text-properties style:font-name="Calibri" fo:font-size="10pt" officeooo:rsid="000818bc" officeooo:paragraph-rsid="000818bc" style:font-size-asian="10pt" style:font-size-complex="10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libri" fo:font-size="10pt" officeooo:rsid="000dccb3" officeooo:paragraph-rsid="001d4a9a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033678" officeooo:paragraph-rsid="0003811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15%"/>
      <style:text-properties style:font-name="Calibri" fo:font-size="10pt" fo:font-weight="bold" officeooo:rsid="000377db" officeooo:paragraph-rsid="0003811e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15%"/>
      <style:text-properties style:font-name="Calibri" fo:font-size="10pt" fo:font-weight="bold" officeooo:rsid="000377db" officeooo:paragraph-rsid="0003811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Calibri" fo:font-size="10pt" fo:font-weight="normal" officeooo:rsid="000bd02e" officeooo:paragraph-rsid="001d4a9a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0pt" fo:font-style="normal" fo:font-weight="bold" officeooo:rsid="000d8f03" officeooo:paragraph-rsid="000d8f03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2e84c" officeooo:paragraph-rsid="00122d31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Calibri" officeooo:rsid="00024ff3" officeooo:paragraph-rsid="00024ff3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Calibri" officeooo:rsid="00013be6" officeooo:paragraph-rsid="0003811e"/>
    </style:style>
    <style:style style:name="P22" style:family="paragraph" style:parent-style-name="Standard">
      <style:paragraph-properties fo:line-height="115%"/>
      <style:text-properties style:font-name="Calibri" officeooo:rsid="00013be6" officeooo:paragraph-rsid="001d4a9a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Standard">
      <style:paragraph-properties fo:text-align="justify" style:justify-single-word="false"/>
      <style:text-properties fo:font-size="10pt" fo:font-style="normal" fo:font-weight="bold" officeooo:rsid="001c8ae9" officeooo:paragraph-rsid="001d4a9a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text-properties fo:font-size="10pt" fo:font-style="normal" style:text-underline-style="none" fo:font-weight="normal" officeooo:rsid="002b6ee6" officeooo:paragraph-rsid="00122d3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fo:font-size="10pt" officeooo:paragraph-rsid="00122d31" style:font-size-asian="10pt" style:font-size-complex="10pt"/>
    </style:style>
    <style:style style:name="P29" style:family="paragraph" style:parent-style-name="Table_20_Contents">
      <style:text-properties fo:font-size="10pt" officeooo:paragraph-rsid="00122d31" style:font-size-asian="10pt" style:font-size-complex="10pt"/>
    </style:style>
    <style:style style:name="P30" style:family="paragraph" style:parent-style-name="Standard">
      <style:text-properties fo:font-size="10pt" officeooo:rsid="00142ce1" officeooo:paragraph-rsid="00122d31" style:font-size-asian="10pt" style:font-size-complex="10pt"/>
    </style:style>
    <style:style style:name="P31" style:family="paragraph" style:parent-style-name="Table_20_Contents">
      <style:text-properties fo:font-size="10pt" officeooo:rsid="000f10b0" officeooo:paragraph-rsid="00122d31" style:font-size-asian="10pt" style:font-size-complex="10pt"/>
    </style:style>
    <style:style style:name="P32" style:family="paragraph" style:parent-style-name="Table_20_Contents">
      <style:text-properties fo:font-size="10pt" officeooo:rsid="000f491b" officeooo:paragraph-rsid="00122d31" style:font-size-asian="10pt" style:font-size-complex="10pt"/>
    </style:style>
    <style:style style:name="P33" style:family="paragraph" style:parent-style-name="Table_20_Contents">
      <style:text-properties fo:font-size="10pt" officeooo:rsid="0011196a" officeooo:paragraph-rsid="00122d31" style:font-size-asian="10pt" style:font-size-complex="10pt"/>
    </style:style>
    <style:style style:name="P34" style:family="paragraph" style:parent-style-name="Table_20_Contents">
      <style:text-properties fo:font-size="10pt" officeooo:rsid="00152d6b" officeooo:paragraph-rsid="00122d31" style:font-size-asian="10pt" style:font-size-complex="10pt"/>
    </style:style>
    <style:style style:name="P35" style:family="paragraph" style:parent-style-name="Table_20_Contents">
      <style:text-properties fo:font-size="10pt" officeooo:rsid="00169ca8" officeooo:paragraph-rsid="00122d31" style:font-size-asian="10pt" style:font-size-complex="10pt"/>
    </style:style>
    <style:style style:name="P36" style:family="paragraph" style:parent-style-name="Table_20_Contents">
      <style:text-properties fo:font-size="10pt" officeooo:rsid="00181830" officeooo:paragraph-rsid="00122d31" style:font-size-asian="10pt" style:font-size-complex="10pt"/>
    </style:style>
    <style:style style:name="P37" style:family="paragraph" style:parent-style-name="Table_20_Contents">
      <style:text-properties fo:font-size="10pt" officeooo:rsid="001b674f" officeooo:paragraph-rsid="00122d31" style:font-size-asian="10pt" style:font-size-complex="10pt"/>
    </style:style>
    <style:style style:name="P38" style:family="paragraph" style:parent-style-name="Table_20_Contents">
      <style:text-properties fo:font-size="10pt" officeooo:rsid="00211804" officeooo:paragraph-rsid="00122d31" style:font-size-asian="10pt" style:font-size-complex="10pt"/>
    </style:style>
    <style:style style:name="P39" style:family="paragraph" style:parent-style-name="Table_20_Contents">
      <style:text-properties fo:font-size="10pt" officeooo:rsid="00245d4e" officeooo:paragraph-rsid="00122d31" style:font-size-asian="10pt" style:font-size-complex="10pt"/>
    </style:style>
    <style:style style:name="P40" style:family="paragraph" style:parent-style-name="Table_20_Contents">
      <style:text-properties fo:font-size="10pt" officeooo:rsid="00238c00" officeooo:paragraph-rsid="00122d31" style:font-size-asian="10pt" style:font-size-complex="10pt"/>
    </style:style>
    <style:style style:name="P41" style:family="paragraph" style:parent-style-name="Table_20_Contents">
      <style:text-properties fo:font-size="10pt" officeooo:rsid="002506d2" officeooo:paragraph-rsid="00122d31" style:font-size-asian="10pt" style:font-size-complex="10pt"/>
    </style:style>
    <style:style style:name="P42" style:family="paragraph" style:parent-style-name="Table_20_Contents">
      <style:text-properties fo:font-size="10pt" officeooo:rsid="0025d967" officeooo:paragraph-rsid="00122d31" style:font-size-asian="10pt" style:font-size-complex="10pt"/>
    </style:style>
    <style:style style:name="P43" style:family="paragraph" style:parent-style-name="Table_20_Contents">
      <style:text-properties fo:font-size="10pt" officeooo:rsid="00294d0e" officeooo:paragraph-rsid="00122d31" style:font-size-asian="10pt" style:font-size-complex="10pt"/>
    </style:style>
    <style:style style:name="P44" style:family="paragraph" style:parent-style-name="Table_20_Contents">
      <style:text-properties fo:font-size="10pt" officeooo:rsid="003dea80" officeooo:paragraph-rsid="00122d31" style:font-size-asian="10pt" style:font-size-complex="10pt"/>
    </style:style>
    <style:style style:name="P45" style:family="paragraph" style:parent-style-name="Table_20_Contents">
      <style:text-properties fo:font-size="10pt" officeooo:rsid="003f8f85" officeooo:paragraph-rsid="00122d31" style:font-size-asian="10pt" style:font-size-complex="10pt"/>
    </style:style>
    <style:style style:name="P46" style:family="paragraph" style:parent-style-name="Table_20_Contents">
      <style:text-properties fo:font-size="10pt" officeooo:rsid="00261d20" officeooo:paragraph-rsid="00122d31" style:font-size-asian="10pt" style:font-size-complex="10pt"/>
    </style:style>
    <style:style style:name="P47" style:family="paragraph" style:parent-style-name="Table_20_Contents">
      <style:text-properties fo:font-size="10pt" officeooo:rsid="0026f883" officeooo:paragraph-rsid="00122d31" style:font-size-asian="10pt" style:font-size-complex="10pt"/>
    </style:style>
    <style:style style:name="P48" style:family="paragraph" style:parent-style-name="Table_20_Contents">
      <style:text-properties fo:font-size="10pt" officeooo:rsid="00275330" officeooo:paragraph-rsid="00122d31" style:font-size-asian="10pt" style:font-size-complex="10pt"/>
    </style:style>
    <style:style style:name="P49" style:family="paragraph" style:parent-style-name="Table_20_Contents">
      <style:text-properties fo:font-size="10pt" officeooo:rsid="002837f6" officeooo:paragraph-rsid="00122d31" style:font-size-asian="10pt" style:font-size-complex="10pt"/>
    </style:style>
    <style:style style:name="P50" style:family="paragraph" style:parent-style-name="Table_20_Contents">
      <style:text-properties fo:font-size="10pt" officeooo:rsid="00296257" officeooo:paragraph-rsid="00122d31" style:font-size-asian="10pt" style:font-size-complex="10pt"/>
    </style:style>
    <style:style style:name="P51" style:family="paragraph" style:parent-style-name="Table_20_Contents">
      <style:text-properties fo:font-size="10pt" officeooo:rsid="0029f8ce" officeooo:paragraph-rsid="00122d31" style:font-size-asian="10pt" style:font-size-complex="10pt"/>
    </style:style>
    <style:style style:name="P52" style:family="paragraph" style:parent-style-name="Table_20_Contents">
      <style:text-properties fo:font-size="10pt" officeooo:rsid="002cda0e" officeooo:paragraph-rsid="00122d31" style:font-size-asian="10pt" style:font-size-complex="10pt"/>
    </style:style>
    <style:style style:name="P53" style:family="paragraph" style:parent-style-name="Table_20_Contents">
      <style:text-properties fo:font-size="10pt" officeooo:rsid="002d3ccb" officeooo:paragraph-rsid="00122d31" style:font-size-asian="10pt" style:font-size-complex="10pt"/>
    </style:style>
    <style:style style:name="P54" style:family="paragraph" style:parent-style-name="Table_20_Contents">
      <style:text-properties fo:font-size="10pt" officeooo:rsid="00352020" officeooo:paragraph-rsid="00122d31" style:font-size-asian="10pt" style:font-size-complex="10pt"/>
    </style:style>
    <style:style style:name="P55" style:family="paragraph" style:parent-style-name="Table_20_Contents">
      <style:text-properties fo:font-size="10pt" officeooo:rsid="0035dcf8" officeooo:paragraph-rsid="00122d31" style:font-size-asian="10pt" style:font-size-complex="10pt"/>
    </style:style>
    <style:style style:name="P56" style:family="paragraph" style:parent-style-name="Table_20_Contents">
      <style:text-properties fo:font-size="10pt" officeooo:rsid="0037c359" officeooo:paragraph-rsid="00122d31" style:font-size-asian="10pt" style:font-size-complex="10pt"/>
    </style:style>
    <style:style style:name="P57" style:family="paragraph" style:parent-style-name="Table_20_Contents">
      <style:text-properties fo:font-size="10pt" officeooo:rsid="00393afd" officeooo:paragraph-rsid="00122d31" style:font-size-asian="10pt" style:font-size-complex="10pt"/>
    </style:style>
    <style:style style:name="P58" style:family="paragraph" style:parent-style-name="Table_20_Contents">
      <style:text-properties fo:font-size="10pt" officeooo:rsid="002f3729" officeooo:paragraph-rsid="00122d31" style:font-size-asian="10pt" style:font-size-complex="10pt"/>
    </style:style>
    <style:style style:name="P59" style:family="paragraph" style:parent-style-name="Table_20_Contents">
      <style:text-properties fo:font-size="10pt" officeooo:rsid="003452ff" officeooo:paragraph-rsid="00122d31" style:font-size-asian="10pt" style:font-size-complex="10pt"/>
    </style:style>
    <style:style style:name="P60" style:family="paragraph" style:parent-style-name="Table_20_Contents">
      <style:text-properties fo:font-size="10pt" officeooo:rsid="0030f66a" officeooo:paragraph-rsid="00122d31" style:font-size-asian="10pt" style:font-size-complex="10pt"/>
    </style:style>
    <style:style style:name="P61" style:family="paragraph" style:parent-style-name="Text_20_body">
      <style:text-properties fo:font-size="10pt" fo:font-weight="bold" officeooo:rsid="00122d31" officeooo:paragraph-rsid="00122d31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normal" fo:font-weight="bold" officeooo:rsid="000f1f3d" officeooo:paragraph-rsid="000f1f3d" style:font-style-asian="normal" style:font-weight-asian="bold" style:font-style-complex="normal" style:font-weight-complex="bold"/>
    </style:style>
    <style:style style:name="P63" style:family="paragraph" style:parent-style-name="Title" style:master-page-name="First_20_Page">
      <style:paragraph-properties style:page-number="auto"/>
      <style:text-properties style:font-name="Calibri" officeooo:rsid="00008545" officeooo:paragraph-rsid="00008545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line-height="115%"/>
      <style:text-properties style:font-name="Calibri" officeooo:paragraph-rsid="00008545"/>
    </style:style>
    <style:style style:name="P68" style:family="paragraph" style:parent-style-name="Heading_20_1">
      <style:paragraph-properties fo:line-height="115%"/>
      <style:text-properties style:font-name="Calibri"/>
    </style:style>
    <style:style style:name="P69" style:family="paragraph" style:parent-style-name="Heading_20_1">
      <style:paragraph-properties fo:line-height="115%"/>
      <style:text-properties style:font-name="Calibri" officeooo:paragraph-rsid="00206ec9"/>
    </style:style>
    <style:style style:name="P70" style:family="paragraph" style:parent-style-name="Heading_20_1">
      <style:paragraph-properties fo:line-height="115%"/>
      <style:text-properties style:font-name="Calibri" officeooo:paragraph-rsid="0023e78d"/>
    </style:style>
    <style:style style:name="P71" style:family="paragraph" style:parent-style-name="Heading_20_1">
      <style:paragraph-properties fo:line-height="115%"/>
      <style:text-properties fo:font-size="10pt" fo:font-weight="normal" officeooo:rsid="0016544e" officeooo:paragraph-rsid="0016544e" style:font-size-asian="8.75pt" style:font-weight-asian="normal" style:font-size-complex="10pt" style:font-weight-complex="normal"/>
    </style:style>
    <style:style style:name="P72" style:family="paragraph" style:parent-style-name="Standard" style:list-style-name="L40">
      <style:paragraph-properties fo:text-align="justify" style:justify-single-word="false"/>
      <style:text-properties style:font-name="Calibri" fo:font-size="10pt" fo:font-style="normal" fo:font-weight="normal" officeooo:rsid="000d8f03" officeooo:paragraph-rsid="000d8f03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 style:list-style-name="L41">
      <style:paragraph-properties fo:text-align="justify" style:justify-single-word="false"/>
      <style:text-properties style:font-name="Calibri" fo:font-size="10pt" fo:font-style="normal" fo:font-weight="normal" officeooo:rsid="000d8f03" officeooo:paragraph-rsid="000d8f03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 style:list-style-name="L42">
      <style:paragraph-properties fo:text-align="start" style:justify-single-word="false"/>
      <style:text-properties style:font-name="Calibri" fo:font-size="10pt" fo:font-style="normal" fo:font-weight="bold" officeooo:rsid="0022e84c" officeooo:paragraph-rsid="00122d31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 style:list-style-name="L42">
      <style:paragraph-properties fo:text-align="start" style:justify-single-word="false"/>
      <style:text-properties style:font-name="Calibri" fo:font-size="10pt" fo:font-style="normal" fo:font-weight="bold" officeooo:rsid="00232879" officeooo:paragraph-rsid="00122d31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Standard">
      <style:paragraph-properties fo:line-height="115%"/>
      <style:text-properties style:font-name="Calibri" fo:font-size="10pt" officeooo:rsid="000377db" officeooo:paragraph-rsid="0003811e" style:font-size-asian="10pt" style:font-size-complex="10pt"/>
    </style:style>
    <style:style style:name="P77" style:family="paragraph" style:parent-style-name="Standard">
      <style:text-properties officeooo:rsid="0039af46" officeooo:paragraph-rsid="00206ec9"/>
    </style:style>
    <style:style style:name="P78" style:family="paragraph" style:parent-style-name="Table_20_Contents" style:list-style-name="L1">
      <style:text-properties fo:font-size="10pt" officeooo:rsid="00152d6b" officeooo:paragraph-rsid="00122d31" style:font-size-asian="10pt" style:font-size-complex="10pt"/>
    </style:style>
    <style:style style:name="P79" style:family="paragraph" style:parent-style-name="Table_20_Contents" style:list-style-name="L18">
      <style:text-properties fo:font-size="10pt" officeooo:rsid="00152d6b" officeooo:paragraph-rsid="00122d31" style:font-size-asian="10pt" style:font-size-complex="10pt"/>
    </style:style>
    <style:style style:name="P80" style:family="paragraph" style:parent-style-name="Table_20_Contents" style:list-style-name="L1">
      <style:text-properties fo:font-size="10pt" officeooo:rsid="00169ca8" officeooo:paragraph-rsid="00122d31" style:font-size-asian="10pt" style:font-size-complex="10pt"/>
    </style:style>
    <style:style style:name="P81" style:family="paragraph" style:parent-style-name="Table_20_Contents" style:list-style-name="L2">
      <style:text-properties fo:font-size="10pt" officeooo:rsid="00169ca8" officeooo:paragraph-rsid="00122d31" style:font-size-asian="10pt" style:font-size-complex="10pt"/>
    </style:style>
    <style:style style:name="P82" style:family="paragraph" style:parent-style-name="Table_20_Contents" style:list-style-name="L3">
      <style:text-properties fo:font-size="10pt" officeooo:rsid="00169ca8" officeooo:paragraph-rsid="00122d31" style:font-size-asian="10pt" style:font-size-complex="10pt"/>
    </style:style>
    <style:style style:name="P83" style:family="paragraph" style:parent-style-name="Table_20_Contents" style:list-style-name="L4">
      <style:text-properties fo:font-size="10pt" officeooo:rsid="00169ca8" officeooo:paragraph-rsid="00122d31" style:font-size-asian="10pt" style:font-size-complex="10pt"/>
    </style:style>
    <style:style style:name="P84" style:family="paragraph" style:parent-style-name="Table_20_Contents" style:list-style-name="L5">
      <style:text-properties fo:font-size="10pt" officeooo:rsid="00169ca8" officeooo:paragraph-rsid="00122d31" style:font-size-asian="10pt" style:font-size-complex="10pt"/>
    </style:style>
    <style:style style:name="P85" style:family="paragraph" style:parent-style-name="Table_20_Contents" style:list-style-name="L6">
      <style:text-properties fo:font-size="10pt" officeooo:rsid="00169ca8" officeooo:paragraph-rsid="00122d31" style:font-size-asian="10pt" style:font-size-complex="10pt"/>
    </style:style>
    <style:style style:name="P86" style:family="paragraph" style:parent-style-name="Table_20_Contents" style:list-style-name="L18">
      <style:text-properties fo:font-size="10pt" officeooo:rsid="00169ca8" officeooo:paragraph-rsid="00122d31" style:font-size-asian="10pt" style:font-size-complex="10pt"/>
    </style:style>
    <style:style style:name="P87" style:family="paragraph" style:parent-style-name="Table_20_Contents" style:list-style-name="L7">
      <style:text-properties fo:font-size="10pt" officeooo:rsid="00211804" officeooo:paragraph-rsid="00122d31" style:font-size-asian="10pt" style:font-size-complex="10pt"/>
    </style:style>
    <style:style style:name="P88" style:family="paragraph" style:parent-style-name="Table_20_Contents" style:list-style-name="L8">
      <style:text-properties fo:font-size="10pt" officeooo:rsid="00211804" officeooo:paragraph-rsid="00122d31" style:font-size-asian="10pt" style:font-size-complex="10pt"/>
    </style:style>
    <style:style style:name="P89" style:family="paragraph" style:parent-style-name="Table_20_Contents" style:list-style-name="L9">
      <style:text-properties fo:font-size="10pt" officeooo:rsid="00245d4e" officeooo:paragraph-rsid="00122d31" style:font-size-asian="10pt" style:font-size-complex="10pt"/>
    </style:style>
    <style:style style:name="P90" style:family="paragraph" style:parent-style-name="Table_20_Contents" style:list-style-name="L10">
      <style:text-properties fo:font-size="10pt" officeooo:rsid="0025d967" officeooo:paragraph-rsid="00122d31" style:font-size-asian="10pt" style:font-size-complex="10pt"/>
    </style:style>
    <style:style style:name="P91" style:family="paragraph" style:parent-style-name="Table_20_Contents" style:list-style-name="L11">
      <style:text-properties fo:font-size="10pt" officeooo:rsid="0025d967" officeooo:paragraph-rsid="00122d31" style:font-size-asian="10pt" style:font-size-complex="10pt"/>
    </style:style>
    <style:style style:name="P92" style:family="paragraph" style:parent-style-name="Table_20_Contents" style:list-style-name="L12">
      <style:text-properties fo:font-size="10pt" officeooo:rsid="0025d967" officeooo:paragraph-rsid="00122d31" style:font-size-asian="10pt" style:font-size-complex="10pt"/>
    </style:style>
    <style:style style:name="P93" style:family="paragraph" style:parent-style-name="Table_20_Contents" style:list-style-name="L13">
      <style:text-properties fo:font-size="10pt" officeooo:rsid="0025d967" officeooo:paragraph-rsid="00122d31" style:font-size-asian="10pt" style:font-size-complex="10pt"/>
    </style:style>
    <style:style style:name="P94" style:family="paragraph" style:parent-style-name="Table_20_Contents" style:list-style-name="L14">
      <style:text-properties fo:font-size="10pt" officeooo:rsid="0025d967" officeooo:paragraph-rsid="00122d31" style:font-size-asian="10pt" style:font-size-complex="10pt"/>
    </style:style>
    <style:style style:name="P95" style:family="paragraph" style:parent-style-name="Table_20_Contents" style:list-style-name="L15">
      <style:text-properties fo:font-size="10pt" officeooo:rsid="0025d967" officeooo:paragraph-rsid="00122d31" style:font-size-asian="10pt" style:font-size-complex="10pt"/>
    </style:style>
    <style:style style:name="P96" style:family="paragraph" style:parent-style-name="Table_20_Contents" style:list-style-name="L16">
      <style:text-properties fo:font-size="10pt" officeooo:rsid="0025d967" officeooo:paragraph-rsid="00122d31" style:font-size-asian="10pt" style:font-size-complex="10pt"/>
    </style:style>
    <style:style style:name="P97" style:family="paragraph" style:parent-style-name="Table_20_Contents" style:list-style-name="L17">
      <style:text-properties fo:font-size="10pt" officeooo:rsid="00275ead" officeooo:paragraph-rsid="00122d31" style:font-size-asian="10pt" style:font-size-complex="10pt"/>
    </style:style>
    <style:style style:name="P98" style:family="paragraph" style:parent-style-name="Table_20_Contents" style:list-style-name="L18">
      <style:text-properties fo:font-size="10pt" officeooo:rsid="003f8f85" officeooo:paragraph-rsid="00122d31" style:font-size-asian="10pt" style:font-size-complex="10pt"/>
    </style:style>
    <style:style style:name="P99" style:family="paragraph" style:parent-style-name="Table_20_Contents" style:list-style-name="L19">
      <style:text-properties fo:font-size="10pt" officeooo:rsid="003f8f85" officeooo:paragraph-rsid="00122d31" style:font-size-asian="10pt" style:font-size-complex="10pt"/>
    </style:style>
    <style:style style:name="P100" style:family="paragraph" style:parent-style-name="Table_20_Contents" style:list-style-name="Numbering_20_123">
      <style:text-properties fo:font-size="10pt" officeooo:rsid="00261d20" officeooo:paragraph-rsid="00122d31" style:font-size-asian="10pt" style:font-size-complex="10pt"/>
    </style:style>
    <style:style style:name="P101" style:family="paragraph" style:parent-style-name="Table_20_Contents" style:list-style-name="L23">
      <style:text-properties fo:font-size="10pt" officeooo:rsid="00261d20" officeooo:paragraph-rsid="00122d31" style:font-size-asian="10pt" style:font-size-complex="10pt"/>
    </style:style>
    <style:style style:name="P102" style:family="paragraph" style:parent-style-name="Table_20_Contents" style:list-style-name="L24">
      <style:text-properties fo:font-size="10pt" officeooo:rsid="00261d20" officeooo:paragraph-rsid="00122d31" style:font-size-asian="10pt" style:font-size-complex="10pt"/>
    </style:style>
    <style:style style:name="P103" style:family="paragraph" style:parent-style-name="Table_20_Contents" style:list-style-name="L25">
      <style:text-properties fo:font-size="10pt" officeooo:rsid="00261d20" officeooo:paragraph-rsid="00122d31" style:font-size-asian="10pt" style:font-size-complex="10pt"/>
    </style:style>
    <style:style style:name="P104" style:family="paragraph" style:parent-style-name="Table_20_Contents" style:list-style-name="L31">
      <style:text-properties fo:font-size="10pt" officeooo:rsid="00261d20" officeooo:paragraph-rsid="00122d31" style:font-size-asian="10pt" style:font-size-complex="10pt"/>
    </style:style>
    <style:style style:name="P105" style:family="paragraph" style:parent-style-name="Table_20_Contents" style:list-style-name="L35">
      <style:text-properties fo:font-size="10pt" officeooo:rsid="00261d20" officeooo:paragraph-rsid="00122d31" style:font-size-asian="10pt" style:font-size-complex="10pt"/>
    </style:style>
    <style:style style:name="P106" style:family="paragraph" style:parent-style-name="Table_20_Contents" style:list-style-name="L37">
      <style:text-properties fo:font-size="10pt" officeooo:rsid="00261d20" officeooo:paragraph-rsid="00122d31" style:font-size-asian="10pt" style:font-size-complex="10pt"/>
    </style:style>
    <style:style style:name="P107" style:family="paragraph" style:parent-style-name="Table_20_Contents" style:list-style-name="Numbering_20_123">
      <style:text-properties fo:font-size="10pt" officeooo:rsid="0026f883" officeooo:paragraph-rsid="00122d31" style:font-size-asian="10pt" style:font-size-complex="10pt"/>
    </style:style>
    <style:style style:name="P108" style:family="paragraph" style:parent-style-name="Table_20_Contents" style:list-style-name="L20">
      <style:text-properties fo:font-size="10pt" officeooo:rsid="0026f883" officeooo:paragraph-rsid="00122d31" style:font-size-asian="10pt" style:font-size-complex="10pt"/>
    </style:style>
    <style:style style:name="P109" style:family="paragraph" style:parent-style-name="Table_20_Contents" style:list-style-name="L21">
      <style:text-properties fo:font-size="10pt" officeooo:rsid="0026f883" officeooo:paragraph-rsid="00122d31" style:font-size-asian="10pt" style:font-size-complex="10pt"/>
    </style:style>
    <style:style style:name="P110" style:family="paragraph" style:parent-style-name="Table_20_Contents" style:list-style-name="L22">
      <style:text-properties fo:font-size="10pt" officeooo:rsid="00275330" officeooo:paragraph-rsid="00122d31" style:font-size-asian="10pt" style:font-size-complex="10pt"/>
    </style:style>
    <style:style style:name="P111" style:family="paragraph" style:parent-style-name="Table_20_Contents" style:list-style-name="L23">
      <style:text-properties fo:font-size="10pt" officeooo:rsid="00296257" officeooo:paragraph-rsid="00122d31" style:font-size-asian="10pt" style:font-size-complex="10pt"/>
    </style:style>
    <style:style style:name="P112" style:family="paragraph" style:parent-style-name="Table_20_Contents" style:list-style-name="L24">
      <style:text-properties fo:font-size="10pt" officeooo:rsid="00296257" officeooo:paragraph-rsid="00122d31" style:font-size-asian="10pt" style:font-size-complex="10pt"/>
    </style:style>
    <style:style style:name="P113" style:family="paragraph" style:parent-style-name="Table_20_Contents" style:list-style-name="L25">
      <style:text-properties fo:font-size="10pt" officeooo:rsid="00296257" officeooo:paragraph-rsid="00122d31" style:font-size-asian="10pt" style:font-size-complex="10pt"/>
    </style:style>
    <style:style style:name="P114" style:family="paragraph" style:parent-style-name="Table_20_Contents" style:list-style-name="L25">
      <style:text-properties fo:font-size="10pt" officeooo:rsid="0029f8ce" officeooo:paragraph-rsid="00122d31" style:font-size-asian="10pt" style:font-size-complex="10pt"/>
    </style:style>
    <style:style style:name="P115" style:family="paragraph" style:parent-style-name="Table_20_Contents" style:list-style-name="L26">
      <style:text-properties fo:font-size="10pt" officeooo:rsid="0029f8ce" officeooo:paragraph-rsid="00122d31" style:font-size-asian="10pt" style:font-size-complex="10pt"/>
    </style:style>
    <style:style style:name="P116" style:family="paragraph" style:parent-style-name="Table_20_Contents" style:list-style-name="L27">
      <style:text-properties fo:font-size="10pt" officeooo:rsid="002ab764" officeooo:paragraph-rsid="00122d31" style:font-size-asian="10pt" style:font-size-complex="10pt"/>
    </style:style>
    <style:style style:name="P117" style:family="paragraph" style:parent-style-name="Table_20_Contents" style:list-style-name="L28">
      <style:text-properties fo:font-size="10pt" officeooo:rsid="002cda0e" officeooo:paragraph-rsid="00122d31" style:font-size-asian="10pt" style:font-size-complex="10pt"/>
    </style:style>
    <style:style style:name="P118" style:family="paragraph" style:parent-style-name="Table_20_Contents" style:list-style-name="L29">
      <style:text-properties fo:font-size="10pt" officeooo:rsid="002cda0e" officeooo:paragraph-rsid="00122d31" style:font-size-asian="10pt" style:font-size-complex="10pt"/>
    </style:style>
    <style:style style:name="P119" style:family="paragraph" style:parent-style-name="Table_20_Contents" style:list-style-name="L30">
      <style:text-properties fo:font-size="10pt" officeooo:rsid="002cda0e" officeooo:paragraph-rsid="00122d31" style:font-size-asian="10pt" style:font-size-complex="10pt"/>
    </style:style>
    <style:style style:name="P120" style:family="paragraph" style:parent-style-name="Table_20_Contents" style:list-style-name="L31">
      <style:text-properties fo:font-size="10pt" officeooo:rsid="002d3ccb" officeooo:paragraph-rsid="00122d31" style:font-size-asian="10pt" style:font-size-complex="10pt"/>
    </style:style>
    <style:style style:name="P121" style:family="paragraph" style:parent-style-name="Table_20_Contents" style:list-style-name="L35">
      <style:text-properties fo:font-size="10pt" officeooo:rsid="002d3ccb" officeooo:paragraph-rsid="00122d31" style:font-size-asian="10pt" style:font-size-complex="10pt"/>
    </style:style>
    <style:style style:name="P122" style:family="paragraph" style:parent-style-name="Table_20_Contents" style:list-style-name="L37">
      <style:text-properties fo:font-size="10pt" officeooo:rsid="002d3ccb" officeooo:paragraph-rsid="00122d31" style:font-size-asian="10pt" style:font-size-complex="10pt"/>
    </style:style>
    <style:style style:name="P123" style:family="paragraph" style:parent-style-name="Table_20_Contents" style:list-style-name="L32">
      <style:text-properties fo:font-size="10pt" officeooo:rsid="0035dcf8" officeooo:paragraph-rsid="00122d31" style:font-size-asian="10pt" style:font-size-complex="10pt"/>
    </style:style>
    <style:style style:name="P124" style:family="paragraph" style:parent-style-name="Table_20_Contents" style:list-style-name="L32">
      <style:text-properties fo:font-size="10pt" officeooo:rsid="0037c359" officeooo:paragraph-rsid="00122d31" style:font-size-asian="10pt" style:font-size-complex="10pt"/>
    </style:style>
    <style:style style:name="P125" style:family="paragraph" style:parent-style-name="Table_20_Contents" style:list-style-name="L33">
      <style:text-properties fo:font-size="10pt" officeooo:rsid="0037c359" officeooo:paragraph-rsid="00122d31" style:font-size-asian="10pt" style:font-size-complex="10pt"/>
    </style:style>
    <style:style style:name="P126" style:family="paragraph" style:parent-style-name="Table_20_Contents" style:list-style-name="L34">
      <style:text-properties fo:font-size="10pt" officeooo:rsid="0037c359" officeooo:paragraph-rsid="00122d31" style:font-size-asian="10pt" style:font-size-complex="10pt"/>
    </style:style>
    <style:style style:name="P127" style:family="paragraph" style:parent-style-name="Table_20_Contents" style:list-style-name="L35">
      <style:text-properties fo:font-size="10pt" officeooo:rsid="00393afd" officeooo:paragraph-rsid="00122d31" style:font-size-asian="10pt" style:font-size-complex="10pt"/>
    </style:style>
    <style:style style:name="P128" style:family="paragraph" style:parent-style-name="Table_20_Contents" style:list-style-name="L36">
      <style:text-properties fo:font-size="10pt" officeooo:rsid="00393afd" officeooo:paragraph-rsid="00122d31" style:font-size-asian="10pt" style:font-size-complex="10pt"/>
    </style:style>
    <style:style style:name="P129" style:family="paragraph" style:parent-style-name="Table_20_Contents" style:list-style-name="L37">
      <style:text-properties fo:font-size="10pt" officeooo:rsid="002f3729" officeooo:paragraph-rsid="00122d31" style:font-size-asian="10pt" style:font-size-complex="10pt"/>
    </style:style>
    <style:style style:name="P130" style:family="paragraph" style:parent-style-name="Table_20_Contents" style:list-style-name="L38">
      <style:text-properties fo:font-size="10pt" officeooo:rsid="0030f66a" officeooo:paragraph-rsid="00122d31" style:font-size-asian="10pt" style:font-size-complex="10pt"/>
    </style:style>
    <style:style style:name="P131" style:family="paragraph" style:parent-style-name="Table_20_Contents" style:list-style-name="L39">
      <style:text-properties fo:font-size="10pt" officeooo:rsid="0030f66a" officeooo:paragraph-rsid="00122d31" style:font-size-asian="10pt" style:font-size-complex="10pt"/>
    </style:style>
    <style:style style:name="P132" style:family="paragraph" style:parent-style-name="Text_20_body">
      <style:paragraph-properties fo:line-height="115%"/>
    </style:style>
    <style:style style:name="P133" style:family="paragraph" style:parent-style-name="Text_20_body">
      <style:text-properties officeooo:rsid="0039af46" officeooo:paragraph-rsid="00206e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59ed" style:font-weight-asian="normal" style:font-weight-complex="normal"/>
    </style:style>
    <style:style style:name="T4" style:family="text">
      <style:text-properties fo:font-weight="normal" officeooo:rsid="0010d9bb" style:font-weight-asian="normal" style:font-weight-complex="normal"/>
    </style:style>
    <style:style style:name="T5" style:family="text">
      <style:text-properties fo:font-weight="normal" officeooo:rsid="001ae9e8" style:font-weight-asian="normal" style:font-weight-complex="normal"/>
    </style:style>
    <style:style style:name="T6" style:family="text">
      <style:text-properties fo:font-weight="normal" officeooo:rsid="001061d9" style:font-weight-asian="normal" style:font-weight-complex="normal"/>
    </style:style>
    <style:style style:name="T7" style:family="text">
      <style:text-properties fo:font-weight="normal" officeooo:rsid="001176e0" style:font-weight-asian="normal" style:font-weight-complex="normal"/>
    </style:style>
    <style:style style:name="T8" style:family="text">
      <style:text-properties fo:font-weight="normal" officeooo:rsid="0026341f" style:font-weight-asian="normal" style:font-weight-complex="normal"/>
    </style:style>
    <style:style style:name="T9" style:family="text">
      <style:text-properties fo:font-weight="normal" officeooo:rsid="00232879" style:font-weight-asian="normal" style:font-weight-complex="normal"/>
    </style:style>
    <style:style style:name="T10" style:family="text">
      <style:text-properties fo:font-weight="normal" officeooo:rsid="0023d474" style:font-weight-asian="normal" style:font-weight-complex="normal"/>
    </style:style>
    <style:style style:name="T11" style:family="text">
      <style:text-properties fo:font-weight="normal" officeooo:rsid="0024f61b" style:font-weight-asian="normal" style:font-weight-complex="normal"/>
    </style:style>
    <style:style style:name="T12" style:family="text">
      <style:text-properties officeooo:rsid="0005f271"/>
    </style:style>
    <style:style style:name="T13" style:family="text">
      <style:text-properties officeooo:rsid="000dccb3"/>
    </style:style>
    <style:style style:name="T14" style:family="text">
      <style:text-properties officeooo:rsid="00142eb5"/>
    </style:style>
    <style:style style:name="T15" style:family="text">
      <style:text-properties officeooo:rsid="00048e9e"/>
    </style:style>
    <style:style style:name="T16" style:family="text">
      <style:text-properties officeooo:rsid="00089b32"/>
    </style:style>
    <style:style style:name="T17" style:family="text">
      <style:text-properties officeooo:rsid="00179ca6"/>
    </style:style>
    <style:style style:name="T18" style:family="text">
      <style:text-properties officeooo:rsid="001bd6ef"/>
    </style:style>
    <style:style style:name="T19" style:family="text">
      <style:text-properties officeooo:rsid="0019709a"/>
    </style:style>
    <style:style style:name="T20" style:family="text">
      <style:text-properties officeooo:rsid="001061d9"/>
    </style:style>
    <style:style style:name="T21" style:family="text">
      <style:text-properties officeooo:rsid="001607e7"/>
    </style:style>
    <style:style style:name="T22" style:family="text">
      <style:text-properties officeooo:rsid="0003811e"/>
    </style:style>
    <style:style style:name="T23" style:family="text">
      <style:text-properties officeooo:rsid="000818bc"/>
    </style:style>
    <style:style style:name="T24" style:family="text">
      <style:text-properties style:font-name="Calibri"/>
    </style:style>
    <style:style style:name="T25" style:family="text">
      <style:text-properties style:font-name="Calibri" fo:font-weight="normal" officeooo:rsid="001061d9" style:font-weight-asian="normal" style:font-weight-complex="normal"/>
    </style:style>
    <style:style style:name="T26" style:family="text">
      <style:text-properties style:font-name="Calibri" fo:font-weight="normal" officeooo:rsid="001ef76b" style:font-weight-asian="normal" style:font-weight-complex="normal"/>
    </style:style>
    <style:style style:name="T27" style:family="text">
      <style:text-properties style:font-name="Calibri" fo:font-weight="normal" officeooo:rsid="0020f16c" style:font-weight-asian="normal" style:font-weight-complex="normal"/>
    </style:style>
    <style:style style:name="T28" style:family="text">
      <style:text-properties style:font-name="Calibri" fo:font-size="10pt" style:font-size-asian="10pt" style:font-size-complex="10pt"/>
    </style:style>
    <style:style style:name="T29" style:family="text">
      <style:text-properties style:font-name="Calibri" fo:font-size="10pt" officeooo:rsid="001d4a9a" style:font-size-asian="10pt" style:font-size-complex="10pt"/>
    </style:style>
    <style:style style:name="T30" style:family="text">
      <style:text-properties officeooo:rsid="00303eb4"/>
    </style:style>
    <style:style style:name="T31" style:family="text">
      <style:text-properties officeooo:rsid="003dea80"/>
    </style:style>
    <style:style style:name="T32" style:family="text">
      <style:text-properties officeooo:rsid="00126ed1"/>
    </style:style>
    <style:style style:name="T33" style:family="text">
      <style:text-properties officeooo:rsid="00245d4e"/>
    </style:style>
    <style:style style:name="T34" style:family="text">
      <style:text-properties officeooo:rsid="00294d0e"/>
    </style:style>
    <style:style style:name="T35" style:family="text">
      <style:text-properties officeooo:rsid="00275ead"/>
    </style:style>
    <style:style style:name="T36" style:family="text">
      <style:text-properties officeooo:rsid="0041496a"/>
    </style:style>
    <style:style style:name="T37" style:family="text">
      <style:text-properties officeooo:rsid="0026f883"/>
    </style:style>
    <style:style style:name="T38" style:family="text">
      <style:text-properties officeooo:rsid="002837f6"/>
    </style:style>
    <style:style style:name="T39" style:family="text">
      <style:text-properties officeooo:rsid="00296257"/>
    </style:style>
    <style:style style:name="T40" style:family="text">
      <style:text-properties officeooo:rsid="0029f8ce"/>
    </style:style>
    <style:style style:name="T41" style:family="text">
      <style:text-properties officeooo:rsid="002cda0e"/>
    </style:style>
    <style:style style:name="T42" style:family="text">
      <style:text-properties officeooo:rsid="002d3ccb"/>
    </style:style>
    <style:style style:name="T43" style:family="text">
      <style:text-properties officeooo:rsid="00352020"/>
    </style:style>
    <style:style style:name="T44" style:family="text">
      <style:text-properties officeooo:rsid="0037c359"/>
    </style:style>
    <style:style style:name="T45" style:family="text">
      <style:text-properties officeooo:rsid="00393afd"/>
    </style:style>
    <style:style style:name="T46" style:family="text">
      <style:text-properties officeooo:rsid="003452ff"/>
    </style:style>
    <style:style style:name="T47" style:family="text">
      <style:text-properties officeooo:rsid="0030f66a"/>
    </style:style>
    <style:style style:name="T48" style:family="text">
      <style:text-properties officeooo:rsid="0023e78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"/>
      </text:sequence-decls>
      <text:p text:style-name="P63"/>
      <text:p text:style-name="P2"/>
      <text:p text:style-name="P2"/>
      <text:p text:style-name="P2"/>
      <text:p text:style-name="P2"/>
      <text:p text:style-name="P2"/>
      <text:p text:style-name="P2">FIRMA KURIERSKA</text:p>
      <text:p text:style-name="P3">IO 2, Wiktor Stankiewicz, Maciej Wojciechow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1.0</text:p>
      <text:p text:style-name="P3">Projektowanie Systemów Informatycznych, Artur Samojluk</text:p>
      <text:p text:style-name="P20">UWM, Olsztyn, 27.05.2026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5">Spis treści</text:p>
          </text:index-title>
          <text:p text:style-name="P23"><text:a xlink:type="simple" xlink:href="#__RefHeading___Toc40_1083696470" text:style-name="Index_20_Link" text:visited-style-name="Index_20_Link">Analiza Biznesowa<text:tab/>2</text:a></text:p>
          <text:p text:style-name="P23"><text:a xlink:type="simple" xlink:href="#__RefHeading___Toc42_1083696470" text:style-name="Index_20_Link" text:visited-style-name="Index_20_Link">Analiza Wymagań Na SI<text:tab/>6</text:a></text:p>
          <text:p text:style-name="P23"><text:a xlink:type="simple" xlink:href="#__RefHeading___Toc44_1083696470" text:style-name="Index_20_Link" text:visited-style-name="Index_20_Link">Analiza Funkcjonalna SI<text:tab/>6</text:a></text:p>
          <text:p text:style-name="P23"><text:a xlink:type="simple" xlink:href="#__RefHeading___Toc46_1083696470" text:style-name="Index_20_Link" text:visited-style-name="Index_20_Link">Modelowanie Analityczne SI<text:tab/>16</text:a></text:p>
          <text:p text:style-name="P23"><text:a xlink:type="simple" xlink:href="#__RefHeading___Toc48_1083696470" text:style-name="Index_20_Link" text:visited-style-name="Index_20_Link">Modelowanie Danych<text:tab/>23</text:a></text:p>
          <text:p text:style-name="P23"><text:a xlink:type="simple" xlink:href="#__RefHeading___Toc50_1083696470" text:style-name="Index_20_Link" text:visited-style-name="Index_20_Link">Projektowanie Danych<text:tab/>23</text:a></text:p>
          <text:p text:style-name="P23"><text:a xlink:type="simple" xlink:href="#__RefHeading___Toc52_1083696470" text:style-name="Index_20_Link" text:visited-style-name="Index_20_Link">Projektowanie Interfejsu Użytkownika<text:tab/>23</text:a></text:p>
          <text:p text:style-name="P23"><text:a xlink:type="simple" xlink:href="#__RefHeading___Toc54_1083696470" text:style-name="Index_20_Link" text:visited-style-name="Index_20_Link">Modelowanie Dynamiki SI<text:tab/>23</text:a></text:p>
          <text:p text:style-name="P23"><text:a xlink:type="simple" xlink:href="#__RefHeading___Toc56_1083696470" text:style-name="Index_20_Link" text:visited-style-name="Index_20_Link">Praca Zespołowa<text:tab/>23</text:a></text:p>
        </text:index-body>
      </text:table-of-content>
      <text:illustration-index text:style-name="Sect1" text:protected="true" text:name="Wykaz rysunków1">
        <text:illustration-index-source text:caption-sequence-name="Diagram" text:caption-sequence-format="text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Wykaz rysunków1_Head">
            <text:p text:style-name="Figure_20_Index_20_Heading">Spis Diagramów</text:p>
          </text:index-title>
          <text:p text:style-name="P24"><text:a xlink:type="simple" xlink:href="#Diagram!0%7Csequence" text:style-name="Index_20_Link" text:visited-style-name="Index_20_Link">Diagram 1: Kontekst Biznesowy Firmy Kurierskiej<text:tab/>4</text:a></text:p>
          <text:p text:style-name="P24"><text:a xlink:type="simple" xlink:href="#Diagram!1%7Csequence" text:style-name="Index_20_Link" text:visited-style-name="Index_20_Link">Diagram 2: Trasa Przesyłki<text:tab/>5</text:a></text:p>
          <text:p text:style-name="P24"><text:a xlink:type="simple" xlink:href="#Diagram!2%7Csequence" text:style-name="Index_20_Link" text:visited-style-name="Index_20_Link">Diagram 3: Kontekstowy Diagram Przypadków Użycia<text:tab/>6</text:a></text:p>
          <text:p text:style-name="P24"><text:a xlink:type="simple" xlink:href="#Diagram!3%7Csequence" text:style-name="Index_20_Link" text:visited-style-name="Index_20_Link">Diagram 4: Systemowy Diagram Przypadków Użycia<text:tab/>15</text:a></text:p>
          <text:p text:style-name="P24"><text:a xlink:type="simple" xlink:href="#Diagram!4%7Csequence" text:style-name="Index_20_Link" text:visited-style-name="Index_20_Link">Diagram 5: Model Analityczny Nr 1 "Nadaj Przesyłkę"<text:tab/>16</text:a></text:p>
          <text:p text:style-name="P24"><text:a xlink:type="simple" xlink:href="#Diagram!5%7Csequence" text:style-name="Index_20_Link" text:visited-style-name="Index_20_Link">Diagram 6: Model Analityczny Nr 2 "Pobierz Etykietę"<text:tab/>16</text:a></text:p>
          <text:p text:style-name="P24"><text:a xlink:type="simple" xlink:href="#Diagram!6%7Csequence" text:style-name="Index_20_Link" text:visited-style-name="Index_20_Link">Diagram 7: Model Analityczny Nr 3 "Wysłanie Wniosku O Założenie Konta Stałego Nadawcy"<text:tab/>17</text:a></text:p>
          <text:p text:style-name="P24"><text:a xlink:type="simple" xlink:href="#Diagram!7%7Csequence" text:style-name="Index_20_Link" text:visited-style-name="Index_20_Link">Diagram 8: Model Analityczny Nr 4 "Anuluj Przesyłkę"<text:tab/>17</text:a></text:p>
          <text:p text:style-name="P24"><text:a xlink:type="simple" xlink:href="#Diagram!8%7Csequence" text:style-name="Index_20_Link" text:visited-style-name="Index_20_Link">Diagram 9: Model Analityczny Nr 5 "Lokalizacja Przesyłki"<text:tab/>18</text:a></text:p>
          <text:p text:style-name="P24"><text:a xlink:type="simple" xlink:href="#Diagram!9%7Csequence" text:style-name="Index_20_Link" text:visited-style-name="Index_20_Link">Diagram 10: Model Analityczny Nr 6 "Żądanie Zwrotu"<text:tab/>18</text:a></text:p>
          <text:p text:style-name="P24"><text:a xlink:type="simple" xlink:href="#Diagram!10%7Csequence" text:style-name="Index_20_Link" text:visited-style-name="Index_20_Link">Diagram 11: Model Analityczny Nr 7 "Logowanie"<text:tab/>18</text:a></text:p>
          <text:p text:style-name="P24"><text:a xlink:type="simple" xlink:href="#Diagram!11%7Csequence" text:style-name="Index_20_Link" text:visited-style-name="Index_20_Link">Diagram 12: Model Analityczny Nr 8 "Akceptacja Zwrotu"<text:tab/>19</text:a></text:p>
          <text:p text:style-name="P24"><text:a xlink:type="simple" xlink:href="#Diagram!12%7Csequence" text:style-name="Index_20_Link" text:visited-style-name="Index_20_Link">Diagram 13: Model Analityczny Nr 9 "Odmowa Zwrotu"<text:tab/>19</text:a></text:p>
          <text:p text:style-name="P24"><text:a xlink:type="simple" xlink:href="#Diagram!13%7Csequence" text:style-name="Index_20_Link" text:visited-style-name="Index_20_Link">Diagram 14: Model Analityczny Nr 10 "Wyświetlenie Listy Zwrotów"<text:tab/>20</text:a></text:p>
          <text:p text:style-name="P24"><text:a xlink:type="simple" xlink:href="#Diagram!14%7Csequence" text:style-name="Index_20_Link" text:visited-style-name="Index_20_Link">Diagram 15: Model Analityczny Nr 11 "Stworzenie Konta"<text:tab/>20</text:a></text:p>
          <text:p text:style-name="P24"><text:a xlink:type="simple" xlink:href="#Diagram!15%7Csequence" text:style-name="Index_20_Link" text:visited-style-name="Index_20_Link">Diagram 16: Model Analityczny Nr 12 "Usuwanie Konta"<text:tab/>21</text:a></text:p>
          <text:p text:style-name="P24"><text:a xlink:type="simple" xlink:href="#Diagram!16%7Csequence" text:style-name="Index_20_Link" text:visited-style-name="Index_20_Link">Diagram 17: Model Analityczny Nr 13 "Zmiana Hasła"<text:tab/>21</text:a></text:p>
          <text:p text:style-name="P24"><text:a xlink:type="simple" xlink:href="#Diagram!17%7Csequence" text:style-name="Index_20_Link" text:visited-style-name="Index_20_Link">Diagram 18: Model Analityczny Nr 14 "Aktualizacja Konta"<text:tab/>21</text:a></text:p>
          <text:p text:style-name="P24"><text:a xlink:type="simple" xlink:href="#Diagram!18%7Csequence" text:style-name="Index_20_Link" text:visited-style-name="Index_20_Link">Diagram 19: Model Analityczny Nr 15 "Pobranie Listy Przesyłek Do Transportu"<text:tab/>22</text:a></text:p>
          <text:p text:style-name="P24"><text:a xlink:type="simple" xlink:href="#Diagram!19%7Csequence" text:style-name="Index_20_Link" text:visited-style-name="Index_20_Link">Diagram 20: Model Analityczny Nr 16 "Aktualizacja Stanu Przesyłki"<text:tab/>22</text:a></text:p>
          <text:p text:style-name="P24"><text:a xlink:type="simple" xlink:href="#Diagram!20%7Csequence" text:style-name="Index_20_Link" text:visited-style-name="Index_20_Link">Diagram 21: Konceptualny Diagram Klas<text:tab/>23</text:a></text:p>
        </text:index-body>
      </text:illustration-index>
      <text:h text:style-name="P67" text:outline-level="1" text:is-list-header="true"><text:bookmark-start text:name="__RefHeading___Toc40_1083696470"/>Analiza Biznesowa<text:bookmark-end text:name="__RefHeading___Toc40_1083696470"/></text:h>
      <text:p text:style-name="P4"><text:span text:style-name="T1">Organizacja: </text:span><text:span text:style-name="T2">Firma kurierska działająca na terenie całego kraju.</text:span></text:p>
      <text:p text:style-name="P4"><text:span text:style-name="T2"/></text:p>
      <text:p text:style-name="P4"><text:span text:style-name="T1">Dziedzina Problemowa: </text:span><text:span text:style-name="T2">Obsługa wysyłania przez klientów przesyłek kurierskich oraz kontrola ich trasy.</text:span></text:p>
      <text:p text:style-name="P14">Kontekst <text:span text:style-name="T22">D</text:span>ziedziny <text:span text:style-name="T22">P</text:span>roblemowej<text:span text:style-name="T2">: </text:span><text:span text:style-name="T3">Nadawca za pośrednictwem strony zamawia dostarczenie paczki. Po dokonaniu płatności przez internet zamówienie zostaje dodane do </text:span><text:span text:style-name="T4">rejestru przesyłek </text:span><text:span text:style-name="T5">a nadawca otrzymuje plik zawierający etykietę do wydrukowania i naklejenia na paczkę</text:span><text:span text:style-name="T3">. </text:span><text:span text:style-name="T6">Poprzez specjalną aplikację kurier otrzymuje to zlecenie na liście paczek do odebrania. Po odbiorze, </text:span><text:span text:style-name="T4">zmienia on jej status w systemie</text:span><text:span text:style-name="T6"> po czym zawozi ją do sortowni. Tam </text:span><text:span text:style-name="T4">jej status zostaje zmieniony ponownie</text:span><text:span text:style-name="T6">, po czym wyrusza w trasę. Gdy kurier doręczy przesyłkę, </text:span><text:span text:style-name="T4">kolejny raz zmienia on jej status w rejestrze przesyłek. Nadawcą może być osoba prywatna lub firma. Nadawca który zamierza regularnie nadawać przesyłki może założyć konto stałego nadawcy ułatwiające ten proces. Odbiorca może zażądać zwrotu przesyłki </text:span><text:span text:style-name="T7">do nadawcy</text:span><text:span text:style-name="T4">.</text:span></text:p>
      <text:p text:style-name="P14"><text:span text:style-name="T2"/></text:p>
      <text:p text:style-name="P14"><text:soft-page-break/>Regulacje prawne<text:span text:style-name="T2">: Ustawa Prawo przedsiębiorców, Ustawa o podatku od towarów i usług, Ustawa o ochronie danych osobowych</text:span></text:p>
      <text:p text:style-name="P14"><text:span text:style-name="T2"/></text:p>
      <text:p text:style-name="P6"><text:span text:style-name="T1">Cel wytworzenia systemu informatycznego</text:span><text:span text:style-name="T2">: Umożliwienie klientom łatwego nadawania przesyłek za pomocą strony internetowej lub aplikacji.</text:span></text:p>
      <text:p text:style-name="P21"><text:span text:style-name="T2"/></text:p>
      <text:p text:style-name="P15">Procesy i aktorzy biznesowi<text:span text:style-name="T2">: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6">Proces</text:p>
          </table:table-cell>
          <table:table-cell table:style-name="Tabela1.A1" office:value-type="string">
            <text:p text:style-name="P16">Aktor biznesowy</text:p>
          </table:table-cell>
          <table:table-cell table:style-name="Tabela1.A1" office:value-type="string">
            <text:p text:style-name="P16">Funkcje/Zadania</text:p>
          </table:table-cell>
          <table:table-cell table:style-name="Tabela1.D1" office:value-type="string">
            <text:p text:style-name="P16">Dane</text:p>
          </table:table-cell>
        </table:table-row>
        <table:table-row>
          <table:table-cell table:style-name="Tabela1.A2" office:value-type="string">
            <text:p text:style-name="P16">Co się dzieje?</text:p>
          </table:table-cell>
          <table:table-cell table:style-name="Tabela1.A2" office:value-type="string">
            <text:p text:style-name="P16">Kto uczestniczy spoza organizacji?</text:p>
          </table:table-cell>
          <table:table-cell table:style-name="Tabela1.A2" office:value-type="string">
            <text:p text:style-name="P16">Jakie czynności są wykonywane?</text:p>
          </table:table-cell>
          <table:table-cell table:style-name="Tabela1.D2" office:value-type="string">
            <text:p text:style-name="P16">Jakie dane?</text:p>
          </table:table-cell>
        </table:table-row>
        <table:table-row>
          <table:table-cell table:style-name="Tabela1.A2" office:value-type="string">
            <text:p text:style-name="P5">Nadanie paczki</text:p>
          </table:table-cell>
          <table:table-cell table:style-name="Tabela1.A2" office:value-type="string">
            <text:p text:style-name="P5">Nadawca, Odbiorca</text:p>
          </table:table-cell>
          <table:table-cell table:style-name="Tabela1.A2" office:value-type="string">
            <text:p text:style-name="P11">- <text:span text:style-name="T12">Zebranie danych o paczce, nadawcy, i odbiorcy</text:span></text:p>
            <text:p text:style-name="P7">- Dodanie zlecenia do <text:span text:style-name="T13">rejestru przesyłek</text:span></text:p>
            <text:p text:style-name="P7">- <text:span text:style-name="T14">Nadawca otrzymuje plik z etykietą do wydrukowania i naklejenia na przesyłkę</text:span></text:p>
          </table:table-cell>
          <table:table-cell table:style-name="Tabela1.D2" office:value-type="string">
            <text:p text:style-name="P7">Dane osobowe nadawcy, dane o przesyłce, adres odbiorcy</text:p>
          </table:table-cell>
        </table:table-row>
        <table:table-row>
          <table:table-cell table:style-name="Tabela1.A2" office:value-type="string">
            <text:p text:style-name="P5">Obsługa płatności</text:p>
          </table:table-cell>
          <table:table-cell table:style-name="Tabela1.A2" office:value-type="string">
            <text:p text:style-name="P8">Nadawca, Organizacja obsługująca płatności</text:p>
          </table:table-cell>
          <table:table-cell table:style-name="Tabela1.A2" office:value-type="string">
            <text:p text:style-name="P11">- <text:span text:style-name="T12">Nadawca dokonuje płatności za nadanie przesyłki za pomocą wybranego sposobu</text:span></text:p>
          </table:table-cell>
          <table:table-cell table:style-name="Tabela1.D2" office:value-type="string">
            <text:p text:style-name="P7">Dane płatności</text:p>
          </table:table-cell>
        </table:table-row>
        <table:table-row>
          <table:table-cell table:style-name="Tabela1.A2" office:value-type="string">
            <text:p text:style-name="P5">Rejestracja <text:span text:style-name="T15">konta</text:span> stałego nadawcy</text:p>
          </table:table-cell>
          <table:table-cell table:style-name="Tabela1.A2" office:value-type="string">
            <text:p text:style-name="P12">Stały Nadawca</text:p>
          </table:table-cell>
          <table:table-cell table:style-name="Tabela1.A2" office:value-type="string">
            <text:p text:style-name="P11">- <text:span text:style-name="T16">Stworzenie konta w bazie danych</text:span></text:p>
          </table:table-cell>
          <table:table-cell table:style-name="Tabela1.D2" office:value-type="string">
            <text:p text:style-name="P9">Dane firmy</text:p>
          </table:table-cell>
        </table:table-row>
        <table:table-row>
          <table:table-cell table:style-name="Tabela1.A2" office:value-type="string">
            <text:p text:style-name="P8">Śledzenie <text:span text:style-name="T13">paczki</text:span></text:p>
          </table:table-cell>
          <table:table-cell table:style-name="Tabela1.A2" office:value-type="string">
            <text:p text:style-name="P8">Odbiorca</text:p>
          </table:table-cell>
          <table:table-cell table:style-name="Tabela1.A2" office:value-type="string">
            <text:p text:style-name="P11">- <text:span text:style-name="T17">Otrzymanie przez odbiorcę informacji o danej paczce</text:span></text:p>
          </table:table-cell>
          <table:table-cell table:style-name="Tabela1.D2" office:value-type="string">
            <text:p text:style-name="P9">Dane paczki</text:p>
          </table:table-cell>
        </table:table-row>
        <table:table-row>
          <table:table-cell table:style-name="Tabela1.A2" office:value-type="string">
            <text:p text:style-name="P8">Zwrot przesyłki</text:p>
          </table:table-cell>
          <table:table-cell table:style-name="Tabela1.A2" office:value-type="string">
            <text:p text:style-name="P8">Odbiorca, Nadawca</text:p>
          </table:table-cell>
          <table:table-cell table:style-name="Tabela1.A2" office:value-type="string">
            <text:p text:style-name="P11">- <text:span text:style-name="T18">Wypełnienie formularza zwrotu</text:span></text:p>
            <text:p text:style-name="P11">- <text:span text:style-name="T18">Nastąpienie reszty procesu zwykłego nadania paczki, ale z zamienionymi danymi nadawcy i odbiorcy</text:span></text:p>
          </table:table-cell>
          <table:table-cell table:style-name="Tabela1.D2" office:value-type="string">
            <text:p text:style-name="P10">Dane odbiorcy (zwracającego), formularz zwrotu, dane nadawcy</text:p>
          </table:table-cell>
        </table:table-row>
        <table:table-row>
          <table:table-cell table:style-name="Tabela1.A2" office:value-type="string">
            <text:p text:style-name="P9">Potwierdzenie <text:span text:style-name="T13">doręczenia</text:span> paczki</text:p>
          </table:table-cell>
          <table:table-cell table:style-name="Tabela1.A2" office:value-type="string">
            <text:p text:style-name="P9">Odbiorca (opcjonalnie), <text:span text:style-name="T19">Organizacja obsługująca płatności (opcjonalne)</text:span></text:p>
          </table:table-cell>
          <table:table-cell table:style-name="Tabela1.A2" office:value-type="string">
            <text:p text:style-name="P11">- <text:span text:style-name="T19">Oznaczenie paczki w systemie jako „Doręczona”.</text:span></text:p>
            <text:p text:style-name="P11">- <text:span text:style-name="T19">(Opcjonalne) Zebranie podpisu odbiorcy</text:span></text:p>
            <text:p text:style-name="P11">- <text:span text:style-name="T19">(Opcjonalne) Opłata za paczkę za pobraniem</text:span></text:p>
          </table:table-cell>
          <table:table-cell table:style-name="Tabela1.D2" office:value-type="string">
            <text:p text:style-name="P9">Dane paczki, podpis odbiorcy, <text:span text:style-name="T19">dane płatności</text:span></text:p>
          </table:table-cell>
        </table:table-row>
      </table:table>
      <text:p text:style-name="P76"><text:span text:style-name="T2"/></text:p>
      <text:h text:style-name="P70" text:outline-level="1"><draw:frame draw:style-name="fr2" draw:name="Ramka2" text:anchor-type="paragraph" svg:x="2.434cm" svg:y="0cm" svg:width="12.069cm" style:rel-width="71%" svg:height="9.742cm" style:rel-height="scale-min" draw:z-index="38"><draw:text-box><text:p text:style-name="Diagram"><draw:frame draw:style-name="fr6" draw:name="Obraz2" text:anchor-type="paragraph" svg:width="12.069cm" style:rel-width="100%" svg:height="9.043cm" style:rel-height="scale" draw:z-index="39"><draw:image xlink:href="Pictures/10000001000001C700000155C42D0125.png" xlink:type="simple" xlink:show="embed" xlink:actuate="onLoad" draw:mime-type="image/png"/></draw:frame>Diagram <text:sequence text:ref-name="refDiagram0" text:name="Diagram" text:formula="ooow:Diagram+1" style:num-format="1">1</text:sequence>: Kontekst Biznesowy Firmy Kurierskiej</text:p></draw:text-box></draw:frame><text:soft-page-break/></text:h>
      <text:h text:style-name="P68" text:outline-level="1"><draw:frame draw:style-name="fr1" draw:name="Ramka1" text:anchor-type="paragraph" svg:width="17cm" style:rel-width="100%" svg:height="15.159cm" style:rel-height="scale-min" draw:z-index="40"><draw:text-box><text:p text:style-name="Diagram"><draw:frame draw:style-name="fr6" draw:name="Obraz1" text:anchor-type="paragraph" svg:width="17cm" style:rel-width="100%" svg:height="14.46cm" style:rel-height="scale" draw:z-index="41"><draw:image xlink:href="Pictures/1000000100000262000001FA8BEE88BD.png" xlink:type="simple" xlink:show="embed" xlink:actuate="onLoad" draw:mime-type="image/png"/></draw:frame>Diagram <text:sequence text:ref-name="refDiagram1" text:name="Diagram" text:formula="ooow:Diagram+1" style:num-format="1">2</text:sequence>: Trasa Przesyłki</text:p></draw:text-box></draw:frame><text:soft-page-break/></text:h>
      <text:h text:style-name="P68" text:outline-level="1"/>
      <text:h text:style-name="P68" text:outline-level="1"/>
      <text:h text:style-name="P68" text:outline-level="1"/>
      <text:h text:style-name="P68" text:outline-level="1"/>
      <text:h text:style-name="P68" text:outline-level="1"/>
      <text:h text:style-name="P68" text:outline-level="1"><draw:frame draw:style-name="fr5" draw:name="Ramka3" text:anchor-type="paragraph" svg:x="11.88cm" svg:y="0.517cm" svg:width="4.57cm" draw:z-index="0"><draw:text-box fo:min-height="7.803cm"><text:p text:style-name="Diagram"><draw:frame draw:style-name="fr8" draw:name="Obraz1 kopia 1" text:anchor-type="paragraph" svg:x="0cm" svg:y="0cm" svg:width="4.57cm" style:rel-width="100%" svg:height="7.803cm" style:rel-height="scale" draw:z-index="1"><draw:image xlink:href="Pictures/1000000100000126000001F6057DDEB0.png" xlink:type="simple" xlink:show="embed" xlink:actuate="onLoad" draw:mime-type="image/png"/></draw:frame>Diagram <text:sequence text:ref-name="refDiagram2" text:name="Diagram" text:formula="ooow:Diagram+1" style:num-format="1">3</text:sequence>: Kontekstowy Diagram Przypadków Użycia</text:p></draw:text-box></draw:frame><text:bookmark-start text:name="__RefHeading___Toc42_1083696470"/><text:soft-page-break/>Analiza Wymagań Na SI<text:bookmark-end text:name="__RefHeading___Toc42_1083696470"/></text:h>
      <text:p text:style-name="P18">Wymagania Funkcjonalne:</text:p>
      <text:list text:style-name="L40">
        <text:list-item>
          <text:p text:style-name="P72">Nadawanie przesyłek</text:p>
        </text:list-item>
        <text:list-item>
          <text:p text:style-name="P72">Zwracanie przesyłek</text:p>
        </text:list-item>
        <text:list-item>
          <text:p text:style-name="P72">Lokalizacja przesyłek</text:p>
        </text:list-item>
        <text:list-item>
          <text:p text:style-name="P72">Dodatkowa funkcjonalność dla Stałych Nadawców</text:p>
        </text:list-item>
        <text:list-item>
          <text:p text:style-name="P72">Anulowanie wysyłek</text:p>
        </text:list-item>
        <text:list-item>
          <text:p text:style-name="P72">Zarządzanie kontami Stałych Nadawców, Kurierów oraz Administratorów</text:p>
        </text:list-item>
        <text:list-item>
          <text:p text:style-name="P72">Obsługa płatności</text:p>
        </text:list-item>
      </text:list>
      <text:p text:style-name="P18">Wymagania Niefunkcjonalne:</text:p>
      <text:list text:style-name="L41">
        <text:list-item>
          <text:p text:style-name="P73">Nadawanie paczek bez potrzeby rejestracji konta</text:p>
        </text:list-item>
      </text:list>
      <text:p text:style-name="P62"><text:span text:style-name="T28"/></text:p>
      <text:p text:style-name="P62"><text:span text:style-name="T29">Systemowy </text:span><text:span text:style-name="T28">Słownik </text:span><text:span text:style-name="T29">Systemu Informatycznego</text:span><text:span text:style-name="T28">:</text:span></text:p>
      <text:p text:style-name="P17">Nadawca – <text:span text:style-name="T20">Firma lub osoba prywatna nadająca daną przesyłkę.</text:span></text:p>
      <text:p text:style-name="P17">Odbiorca – <text:span text:style-name="T20">Firma lub osoba prywatna odbierająca daną przesyłkę.</text:span></text:p>
      <text:p text:style-name="P17">Organizacja obsługująca płatności – <text:span text:style-name="T21">Bank lub inna firma która obsługuje wybraną przez nadawcę formę płatności.</text:span></text:p>
      <text:p text:style-name="P17"><text:span text:style-name="T23">Stały Nadawca</text:span> – <text:span text:style-name="T20">Firma lub osoba prywatna która regularnie nadaje przesyłki poprzez firmę kurierską </text:span><text:span text:style-name="T21">i zakłada w tym celu konto stałego nadawcy.</text:span></text:p>
      <text:p text:style-name="P13"><text:span text:style-name="T2">Rejestr przesyłek – </text:span><text:span text:style-name="T6">Baza danych zawierająca informacje o przesyłkach nadanych za pomocą systemu.</text:span></text:p>
      <text:p text:style-name="P26"><text:span text:style-name="T25">Sortownia - </text:span><text:span text:style-name="T26">Placówka w której zachodzi </text:span><text:span text:style-name="T27">identyfikacja i organizacja przesyłek w celu wyznaczenia ich dalszej trasy.</text:span></text:p>
      <text:p text:style-name="P22"><text:span text:style-name="T28"/></text:p>
      <text:h text:style-name="P68" text:outline-level="1"><text:bookmark-start text:name="__RefHeading___Toc44_1083696470"/>Analiza Funkcjonalna SI<text:bookmark-end text:name="__RefHeading___Toc44_1083696470"/></text:h>
      <text:p text:style-name="P19">Przypadki Użycia</text:p>
      <text:list text:style-name="L42">
        <text:list-item>
          <text:p text:style-name="P74">Nadaj przesyłkę – <text:span text:style-name="T9">Nadawca wypełnia formularz z danymi przesyłki którą zamierza wysłać.</text:span></text:p>
        </text:list-item>
        <text:list-item>
          <text:p text:style-name="P74">Pobierz etykietę – <text:span text:style-name="T9">Nadawca pobiera ze strony etykietę wygenerowaną dla jego przesyłki.</text:span></text:p>
        </text:list-item>
        <text:list-item>
          <text:p text:style-name="P74">Wysłanie wniosku o zostanie stałym nadawcą –<text:span text:style-name="T2"> </text:span><text:span text:style-name="T9">Nadawca wypełnia formularz w celu założenia konta stałego nadawcy. Przed stworzeniem konta przez administratora, firma wpierw kontaktuje się z wnioskodawcą w celu ustalenia warunków współpracy.</text:span></text:p>
        </text:list-item>
        <text:list-item>
          <text:p text:style-name="P74">Anulowanie wysyłki – <text:span text:style-name="T9">Zanim przesyłka zostanie odebrana przez kuriera, nadawca może </text:span><text:span text:style-name="T10">(po potwierdzeniu tożsamości) wysłać informację o anulowaniu wysyłki. Pieniądze zostają zwrócone, a paczka usunięta z systemu.</text:span></text:p>
        </text:list-item>
        <text:list-item>
          <text:p text:style-name="P74">Lokalizacja przesyłki – <text:span text:style-name="T9">Odbiorca wprowadza numer przesyłki na stronie internetowej aby wyświetlić obecny stan jego przesyłki.</text:span></text:p>
        </text:list-item>
        <text:list-item>
          <text:p text:style-name="P74">Żądanie zwrotu – <text:span text:style-name="T9">Odbiorca wypełnia formularz w celu odesłania przesyłki do nadawcy. W przypadku zwykłego nadawcy zostaje on zaakceptowany od razu, natomiast zwrot do stałego nadawcy zostaje najpierw przekierowany do systemu zarządzania zwrotami.</text:span></text:p>
        </text:list-item>
        <text:list-item>
          <text:p text:style-name="P74">Logowanie – <text:span text:style-name="T11">Użytkownik wpisuje login, hasło oraz wykorzystuje weryfikację wieloetapową by uzyskać dostęp do konta.</text:span></text:p>
        </text:list-item>
        <text:list-item>
          <text:p text:style-name="P74">Zarządzanie zwrotami – <text:span text:style-name="T10">Stały nadawca wykonuje czynności związane z zarządzaniem otrzymanymi żądaniami zwrotu. </text:span><text:span text:style-name="T30">(CRUD)</text:span></text:p>
          <text:list>
            <text:list-item>
              <text:p text:style-name="P74">Akceptacja zwrotu – <text:span text:style-name="T11">Stały nadawca akceptuje żądanie zwrotu.</text:span></text:p>
            </text:list-item>
            <text:list-item>
              <text:p text:style-name="P74">Odmowa zwrotu – <text:span text:style-name="T11">Stały nadawca odmawia wykonania żądania zwrotu.</text:span></text:p>
            </text:list-item>
            <text:list-item>
              <text:p text:style-name="P74">Pobierz listę zwrotów – <text:span text:style-name="T11">Stały nadawca uzyskuje informacje o jego żądaniach zwrotu.</text:span></text:p>
            </text:list-item>
          </text:list>
        </text:list-item>
        <text:list-item>
          <text:p text:style-name="P74">Stworzenie konta – <text:span text:style-name="T8">Administrator tworzy konto w systemie. </text:span><text:span text:style-name="T30">(CRUD)</text:span></text:p>
          <text:list>
            <text:list-item>
              <text:p text:style-name="P75">Stworzenie konto kuriera – <text:span text:style-name="T8">Administrator tworzy konto dla nowo zatrudnionego kuriera.</text:span></text:p>
            </text:list-item>
            <text:list-item>
              <text:p text:style-name="P75">Stworzenie konta administratora – <text:span text:style-name="T8">Istniejący administrator tworzy konto dla nowego administratora.</text:span></text:p>
            </text:list-item>
            <text:list-item>
              <text:p text:style-name="P75">Stworzenie konta stałego nadawcy – <text:span text:style-name="T8">Administrator tworzy konto dla nowego stałego nadawcy.</text:span></text:p>
            </text:list-item>
          </text:list>
        </text:list-item>
        <text:list-item>
          <text:p text:style-name="P74">Usunięcie konta – <text:span text:style-name="T11">Administrator usuwa konto użytkownika. </text:span><text:span text:style-name="T30">(CRUD)</text:span></text:p>
        </text:list-item>
        <text:list-item>
          <text:p text:style-name="P74">Pobierz listę przesyłek do odbioru – <text:span text:style-name="T11">Kurier otrzymuje listę przesyłek do odebrania danego dnia.</text:span></text:p>
        </text:list-item>
        <text:list-item>
          <text:p text:style-name="P75"><text:soft-page-break/>Aktualizacja stanu przesyłki – <text:span text:style-name="T8">Kurier lub sortownia aktualizują status danej przesyłki w systemie poprzez zeskanowanie kodu. Administratorzy mają bezpośredni dostęp do tej funkcji w celu manualnej naprawy ewentualnych błędów w systemie. </text:span><text:span text:style-name="T30">(CRUD)</text:span></text:p>
          <text:list>
            <text:list-item>
              <text:p text:style-name="P75">Przesyłka odebrana – <text:span text:style-name="T8">Kurier oznacza przesyłkę po odebraniu.</text:span></text:p>
            </text:list-item>
            <text:list-item>
              <text:p text:style-name="P75">Przesyłka w trasie – <text:span text:style-name="T8">Kurier oznacza przesyłkę w transporcie do kolejnej sortowni lub punktu docelowego.</text:span></text:p>
            </text:list-item>
            <text:list-item>
              <text:p text:style-name="P75">Przesyłka dostarczona – <text:span text:style-name="T8">Kurier oznacza przesyłkę dostarczoną do odbiorcy.</text:span></text:p>
            </text:list-item>
            <text:list-item>
              <text:p text:style-name="P75">Przesyłka za pobraniem – <text:span text:style-name="T8">Przed oznaczeniem przesyłki po odbiorze kurier pobiera opłatę o wysokości ustalonej przy nadaniu.</text:span></text:p>
            </text:list-item>
            <text:list-item>
              <text:p text:style-name="P75">Przesyłka z potwierdzeniem odbioru – <text:span text:style-name="T8">Przed oznaczeniem przesyłki po odbiorze kurier zbiera podpisu odbiorcy w celu potwierdzenia doręczenia.</text:span></text:p>
            </text:list-item>
            <text:list-item>
              <text:p text:style-name="P75">Przesyłka w sortowni – <text:span text:style-name="T8">Sortownia oznacza trafiającą do niej przesyłkę.</text:span></text:p>
            </text:list-item>
          </text:list>
        </text:list-item>
      </text:list>
      <text:p text:style-name="P61"/>
      <text:p text:style-name="P61">Scenariusze Przypadków Użycia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1">Nazwa</text:p>
          </table:table-cell>
          <table:table-cell table:style-name="Tabela2.B1" office:value-type="string">
            <text:p text:style-name="P32">Nadaj przesyłkę</text:p>
          </table:table-cell>
        </table:table-row>
        <table:table-row>
          <table:table-cell table:style-name="Tabela2.A2" office:value-type="string">
            <text:p text:style-name="P31">Numer</text:p>
          </table:table-cell>
          <table:table-cell table:style-name="Tabela2.B2" office:value-type="string">
            <text:p text:style-name="P32">1</text:p>
          </table:table-cell>
        </table:table-row>
        <table:table-row>
          <table:table-cell table:style-name="Tabela2.A2" office:value-type="string">
            <text:p text:style-name="P31">Aktorzy</text:p>
          </table:table-cell>
          <table:table-cell table:style-name="Tabela2.B2" office:value-type="string">
            <text:p text:style-name="P32">Nadawca</text:p>
          </table:table-cell>
        </table:table-row>
        <table:table-row>
          <table:table-cell table:style-name="Tabela2.A2" office:value-type="string">
            <text:p text:style-name="P31">Krótki opis</text:p>
          </table:table-cell>
          <table:table-cell table:style-name="Tabela2.B2" office:value-type="string">
            <text:p text:style-name="P33">Nadanie paczki za pomocą internetu</text:p>
          </table:table-cell>
        </table:table-row>
        <table:table-row>
          <table:table-cell table:style-name="Tabela2.A2" office:value-type="string">
            <text:p text:style-name="P31">Warunki wstępne</text:p>
          </table:table-cell>
          <table:table-cell table:style-name="Tabela2.B2" office:value-type="string">
            <text:p text:style-name="P29">-</text:p>
          </table:table-cell>
        </table:table-row>
        <table:table-row>
          <table:table-cell table:style-name="Tabela2.A2" office:value-type="string">
            <text:p text:style-name="P31">Warunki końcowe</text:p>
          </table:table-cell>
          <table:table-cell table:style-name="Tabela2.B2" office:value-type="string">
            <text:p text:style-name="P34">Paczka została dodana do rejestru</text:p>
          </table:table-cell>
        </table:table-row>
        <table:table-row>
          <table:table-cell table:style-name="Tabela2.A2" office:value-type="string">
            <text:p text:style-name="P31">Główny przepływ zdarzeń</text:p>
          </table:table-cell>
          <table:table-cell table:style-name="Tabela2.B2" office:value-type="string">
            <text:list text:style-name="L1">
              <text:list-item>
                <text:p text:style-name="P78">Nadawca wypełnia formularz wysyłki</text:p>
              </text:list-item>
              <text:list-item>
                <text:p text:style-name="P78">System ustala cenę zlecenia</text:p>
              </text:list-item>
              <text:list-item>
                <text:p text:style-name="P78">Nadawca dokonuje płatności za pomocą wybranego sposobu</text:p>
              </text:list-item>
              <text:list-item>
                <text:p text:style-name="P78">Przesyłka zostaje dodana do rejestru</text:p>
              </text:list-item>
              <text:list-item>
                <text:p text:style-name="P78">System generuje etykietę dla tej przesyłki</text:p>
              </text:list-item>
              <text:list-item>
                <text:p text:style-name="P80">System wyświetla numer paczki oraz link do pobrania pliku z etykietą</text:p>
              </text:list-item>
            </text:list>
          </table:table-cell>
        </table:table-row>
        <table:table-row>
          <table:table-cell table:style-name="Tabela2.A2" office:value-type="string">
            <text:p text:style-name="P31">Alternatywne przepływy <text:span text:style-name="T32">zdarzeń</text:span></text:p>
          </table:table-cell>
          <table:table-cell table:style-name="Tabela2.B2" office:value-type="string">
            <text:p text:style-name="P34">1b. Nadawca podał niepoprawne dane.</text:p>
            <text:list xml:id="list4059685398" text:style-name="L2">
              <text:list-item>
                <text:p text:style-name="P81">System odmawia wysłania formularza i podświetla niepoprawne pola</text:p>
              </text:list-item>
            </text:list>
            <text:p text:style-name="P34">3b. Płatność odrzucona</text:p>
            <text:list text:style-name="L3">
              <text:list-item>
                <text:p text:style-name="P82">System wyświetla komunikat o błędzie</text:p>
              </text:list-item>
              <text:list-item>
                <text:p text:style-name="P82">Nadawca powraca do strony wyboru sposobu płatności</text:p>
              </text:list-item>
            </text:list>
          </table:table-cell>
        </table:table-row>
        <table:table-row>
          <table:table-cell table:style-name="Tabela2.A2" office:value-type="string">
            <text:p text:style-name="P31">Specjalne wymagania</text:p>
          </table:table-cell>
          <table:table-cell table:style-name="Tabela2.B2" office:value-type="string">
            <text:p text:style-name="P29">-</text:p>
          </table:table-cell>
        </table:table-row>
        <table:table-row table:style-name="Tabela2.10">
          <table:table-cell table:style-name="Tabela2.A2" office:value-type="string">
            <text:p text:style-name="P31">Notatki</text:p>
          </table:table-cell>
          <table:table-cell table:style-name="Tabela2.B2" office:value-type="string">
            <text:p text:style-name="P34">-</text:p>
          </table:table-cell>
        </table:table-row>
      </table:table>
      <text:p text:style-name="P28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Nazwa</text:p>
          </table:table-cell>
          <table:table-cell table:style-name="Tabela3.B1" office:value-type="string">
            <text:p text:style-name="P35">Pobierz etykietę</text:p>
          </table:table-cell>
        </table:table-row>
        <table:table-row>
          <table:table-cell table:style-name="Tabela3.A2" office:value-type="string">
            <text:p text:style-name="P31">Numer</text:p>
          </table:table-cell>
          <table:table-cell table:style-name="Tabela3.B2" office:value-type="string">
            <text:p text:style-name="P35">2</text:p>
          </table:table-cell>
        </table:table-row>
        <table:table-row>
          <table:table-cell table:style-name="Tabela3.A2" office:value-type="string">
            <text:p text:style-name="P31">Aktorzy</text:p>
          </table:table-cell>
          <table:table-cell table:style-name="Tabela3.B2" office:value-type="string">
            <text:p text:style-name="P35">Nadawca</text:p>
          </table:table-cell>
        </table:table-row>
        <table:table-row>
          <table:table-cell table:style-name="Tabela3.A2" office:value-type="string">
            <text:p text:style-name="P31">Krótki opis</text:p>
          </table:table-cell>
          <table:table-cell table:style-name="Tabela3.B2" office:value-type="string">
            <text:p text:style-name="P35">Wysłanie maila z plikiem z etykietą paczki</text:p>
          </table:table-cell>
        </table:table-row>
        <table:table-row>
          <table:table-cell table:style-name="Tabela3.A2" office:value-type="string">
            <text:p text:style-name="P31">Warunki wstępne</text:p>
          </table:table-cell>
          <table:table-cell table:style-name="Tabela3.B2" office:value-type="string">
            <text:p text:style-name="P35">Przesyłka musi istnieć</text:p>
          </table:table-cell>
        </table:table-row>
        <table:table-row>
          <table:table-cell table:style-name="Tabela3.A2" office:value-type="string">
            <text:p text:style-name="P31">Warunki końcowe</text:p>
          </table:table-cell>
          <table:table-cell table:style-name="Tabela3.B2" office:value-type="string">
            <text:p text:style-name="P35">Nadawca otrzymuje mail z etykietą paczki</text:p>
          </table:table-cell>
        </table:table-row>
        <table:table-row>
          <table:table-cell table:style-name="Tabela3.A2" office:value-type="string">
            <text:p text:style-name="P31">Główny przepływ zdarzeń</text:p>
          </table:table-cell>
          <table:table-cell table:style-name="Tabela3.B2" office:value-type="string">
            <text:list text:style-name="L4">
              <text:list-item>
                <text:p text:style-name="P83">Nadawca wprowadza numer paczki</text:p>
              </text:list-item>
              <text:list-item>
                <text:p text:style-name="P83">System wysyła mail z plikiem z etykietą na adres podany podczas nadawania paczki</text:p>
              </text:list-item>
            </text:list>
          </table:table-cell>
        </table:table-row>
        <text:soft-page-break/>
        <table:table-row>
          <table:table-cell table:style-name="Tabela3.A2" office:value-type="string">
            <text:p text:style-name="P31">Alternatywne przepływy <text:span text:style-name="T32">zdarzeń</text:span></text:p>
          </table:table-cell>
          <table:table-cell table:style-name="Tabela3.B2" office:value-type="string">
            <text:p text:style-name="P35">1b. Numer paczki jest niepoprawny</text:p>
            <text:list text:style-name="L5">
              <text:list-item>
                <text:p text:style-name="P84">Wyświetlony zostaje komunikat o błędzie</text:p>
              </text:list-item>
            </text:list>
            <text:p text:style-name="P35">2b. Nadawca wybiera opcję otrzymania etykiety na inny adres e-mail</text:p>
            <text:list text:style-name="L6">
              <text:list-item>
                <text:p text:style-name="P85">Mail zostaje wysłany na nowy adres e-mail zamiast podanego przy nadawaniu</text:p>
              </text:list-item>
            </text:list>
          </table:table-cell>
        </table:table-row>
        <table:table-row>
          <table:table-cell table:style-name="Tabela3.A2" office:value-type="string">
            <text:p text:style-name="P31">Specjalne wymagania</text:p>
          </table:table-cell>
          <table:table-cell table:style-name="Tabela3.B2" office:value-type="string">
            <text:p text:style-name="P29">-</text:p>
          </table:table-cell>
        </table:table-row>
        <table:table-row table:style-name="Tabela3.10">
          <table:table-cell table:style-name="Tabela3.A2" office:value-type="string">
            <text:p text:style-name="P31">Notatki</text:p>
          </table:table-cell>
          <table:table-cell table:style-name="Tabela3.B2" office:value-type="string">
            <text:p text:style-name="P34">-</text:p>
          </table:table-cell>
        </table:table-row>
      </table:table>
      <text:p text:style-name="P3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Nazwa</text:p>
          </table:table-cell>
          <table:table-cell table:style-name="Tabela4.B1" office:value-type="string">
            <text:p text:style-name="P36">Wysłanie wniosku o zostanie stałym nadawcą</text:p>
          </table:table-cell>
        </table:table-row>
        <table:table-row>
          <table:table-cell table:style-name="Tabela4.A2" office:value-type="string">
            <text:p text:style-name="P31">Numer</text:p>
          </table:table-cell>
          <table:table-cell table:style-name="Tabela4.B2" office:value-type="string">
            <text:p text:style-name="P36">3</text:p>
          </table:table-cell>
        </table:table-row>
        <table:table-row>
          <table:table-cell table:style-name="Tabela4.A2" office:value-type="string">
            <text:p text:style-name="P31">Aktorzy</text:p>
          </table:table-cell>
          <table:table-cell table:style-name="Tabela4.B2" office:value-type="string">
            <text:p text:style-name="P37">Wnioskodawca, Odpowiedzialny za współpracę pracownik firmy</text:p>
          </table:table-cell>
        </table:table-row>
        <table:table-row>
          <table:table-cell table:style-name="Tabela4.A2" office:value-type="string">
            <text:p text:style-name="P31">Krótki opis</text:p>
          </table:table-cell>
          <table:table-cell table:style-name="Tabela4.B2" office:value-type="string">
            <text:p text:style-name="P37">Wnioskodawca wysyła wniosek o założenie konta stałego nadawcy</text:p>
          </table:table-cell>
        </table:table-row>
        <table:table-row>
          <table:table-cell table:style-name="Tabela4.A2" office:value-type="string">
            <text:p text:style-name="P31">Warunki wstępne</text:p>
          </table:table-cell>
          <table:table-cell table:style-name="Tabela4.B2" office:value-type="string">
            <text:p text:style-name="P29">-</text:p>
          </table:table-cell>
        </table:table-row>
        <table:table-row>
          <table:table-cell table:style-name="Tabela4.A2" office:value-type="string">
            <text:p text:style-name="P31">Warunki końcowe</text:p>
          </table:table-cell>
          <table:table-cell table:style-name="Tabela4.B2" office:value-type="string">
            <text:p text:style-name="P37">Odpowiedzialny za współpracę pracownik firmy otrzymuje wniosek o zostanie stałym nadawcą </text:p>
          </table:table-cell>
        </table:table-row>
        <table:table-row>
          <table:table-cell table:style-name="Tabela4.A2" office:value-type="string">
            <text:p text:style-name="P31">Główny przepływ zdarzeń</text:p>
          </table:table-cell>
          <table:table-cell table:style-name="Tabela4.B2" office:value-type="string">
            <text:list text:style-name="L7">
              <text:list-item>
                <text:p text:style-name="P87">Wnioskodawca wypełnia formularz</text:p>
              </text:list-item>
              <text:list-item>
                <text:p text:style-name="P87">Dane zostają wysłane na jeden z e-maili zdefiniowanych przez administratora</text:p>
              </text:list-item>
            </text:list>
          </table:table-cell>
        </table:table-row>
        <table:table-row>
          <table:table-cell table:style-name="Tabela4.A2" office:value-type="string">
            <text:p text:style-name="P31">Alternatywne przepływy <text:span text:style-name="T32">zdarzeń</text:span></text:p>
          </table:table-cell>
          <table:table-cell table:style-name="Tabela4.B2" office:value-type="string">
            <text:p text:style-name="P38">1b. Wnioskodawca podał błędne dane w formularzu</text:p>
            <text:list text:style-name="L8">
              <text:list-item>
                <text:p text:style-name="P88">Dane nie zostają wysłane.</text:p>
              </text:list-item>
            </text:list>
          </table:table-cell>
        </table:table-row>
        <table:table-row>
          <table:table-cell table:style-name="Tabela4.A2" office:value-type="string">
            <text:p text:style-name="P31">Specjalne wymagania</text:p>
          </table:table-cell>
          <table:table-cell table:style-name="Tabela4.B2" office:value-type="string">
            <text:p text:style-name="P38">Powinna istnieć funkcja zabezpieczająca przed wysyłaniem wielu wniosków w krótkim czasie przez jedną osobę.</text:p>
          </table:table-cell>
        </table:table-row>
        <table:table-row table:style-name="Tabela4.10">
          <table:table-cell table:style-name="Tabela4.A2" office:value-type="string">
            <text:p text:style-name="P31">Notatki</text:p>
          </table:table-cell>
          <table:table-cell table:style-name="Tabela4.B2" office:value-type="string">
            <text:p text:style-name="P38">Tylko część danych w formularzu może być automatycznie sprawdzona.</text:p>
          </table:table-cell>
        </table:table-row>
      </table:table>
      <text:p text:style-name="P30"/>
      <text:p text:style-name="P3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1">Nazwa</text:p>
          </table:table-cell>
          <table:table-cell table:style-name="Tabela5.B1" office:value-type="string">
            <text:p text:style-name="P39">Anulowanie wysyłki</text:p>
          </table:table-cell>
        </table:table-row>
        <table:table-row>
          <table:table-cell table:style-name="Tabela5.A2" office:value-type="string">
            <text:p text:style-name="P31">Numer</text:p>
          </table:table-cell>
          <table:table-cell table:style-name="Tabela5.B2" office:value-type="string">
            <text:p text:style-name="P40">4</text:p>
          </table:table-cell>
        </table:table-row>
        <table:table-row>
          <table:table-cell table:style-name="Tabela5.A2" office:value-type="string">
            <text:p text:style-name="P31">Aktorzy</text:p>
          </table:table-cell>
          <table:table-cell table:style-name="Tabela5.B2" office:value-type="string">
            <text:p text:style-name="P39">Nadawca</text:p>
          </table:table-cell>
        </table:table-row>
        <table:table-row>
          <table:table-cell table:style-name="Tabela5.A2" office:value-type="string">
            <text:p text:style-name="P31">Krótki opis</text:p>
          </table:table-cell>
          <table:table-cell table:style-name="Tabela5.B2" office:value-type="string">
            <text:p text:style-name="P39">Nadawca anuluje zlecenie</text:p>
          </table:table-cell>
        </table:table-row>
        <table:table-row>
          <table:table-cell table:style-name="Tabela5.A2" office:value-type="string">
            <text:p text:style-name="P31">Warunki wstępne</text:p>
          </table:table-cell>
          <table:table-cell table:style-name="Tabela5.B2" office:value-type="string">
            <text:list text:style-name="L9">
              <text:list-item>
                <text:p text:style-name="P89">Przesyłka musi istnieć</text:p>
              </text:list-item>
              <text:list-item>
                <text:p text:style-name="P89">Przesyłka musi być oznaczona jako „Oczekuje na odbiór”</text:p>
              </text:list-item>
            </text:list>
          </table:table-cell>
        </table:table-row>
        <table:table-row>
          <table:table-cell table:style-name="Tabela5.A2" office:value-type="string">
            <text:p text:style-name="P31">Warunki końcowe</text:p>
          </table:table-cell>
          <table:table-cell table:style-name="Tabela5.B2" office:value-type="string">
            <text:p text:style-name="P41">Przesyłka zostaje oznaczona w rejestrze jako „Anulowana”</text:p>
          </table:table-cell>
        </table:table-row>
        <table:table-row>
          <table:table-cell table:style-name="Tabela5.A2" office:value-type="string">
            <text:p text:style-name="P31">Główny przepływ zdarzeń</text:p>
          </table:table-cell>
          <table:table-cell table:style-name="Tabela5.B2" office:value-type="string">
            <text:list text:style-name="L10">
              <text:list-item>
                <text:p text:style-name="P90">Nadawca wybiera numer przesyłki</text:p>
              </text:list-item>
              <text:list-item>
                <text:p text:style-name="P90">Nadawca potwierdza swoją tożsamość</text:p>
              </text:list-item>
              <text:list-item>
                <text:p text:style-name="P90">System anuluje przesyłkę</text:p>
              </text:list-item>
            </text:list>
          </table:table-cell>
        </table:table-row>
        <table:table-row>
          <table:table-cell table:style-name="Tabela5.A2" office:value-type="string">
            <text:p text:style-name="P31">Alternatywne przepływy <text:span text:style-name="T32">zdarzeń</text:span></text:p>
          </table:table-cell>
          <table:table-cell table:style-name="Tabela5.B2" office:value-type="string">
            <text:p text:style-name="P42">1b. Niepoprawny numer przesyłki</text:p>
            <text:list text:style-name="L11">
              <text:list-item>
                <text:p text:style-name="P91">System wyświetla błąd i prosi o podanie poprawnego numeru</text:p>
              </text:list-item>
            </text:list>
            <text:p text:style-name="P42">1c. Przesyłka nie jest oznaczona jako „<text:span text:style-name="T33">Oczekuje na odbió</text:span>r”</text:p>
            <text:list text:style-name="L12">
              <text:list-item>
                <text:p text:style-name="P92">System wyświetla błąd i <text:span text:style-name="T34">prosi o podanie poprawnego numeru</text:span></text:p>
              </text:list-item>
            </text:list>
            <text:p text:style-name="P42">2b.</text:p>
            <text:list text:style-name="L13">
              <text:list-item>
                <text:p text:style-name="P93">System wyświetla błąd i kończy <text:span text:style-name="T34">działanie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31">Specjalne wymagania</text:p>
          </table:table-cell>
          <table:table-cell table:style-name="Tabela5.B2" office:value-type="string">
            <text:p text:style-name="P43">Musi istnieć silny system weryfikacji tożsamości nadawcy</text:p>
          </table:table-cell>
        </table:table-row>
        <text:soft-page-break/>
        <table:table-row table:style-name="Tabela5.10">
          <table:table-cell table:style-name="Tabela5.A2" office:value-type="string">
            <text:p text:style-name="P31">Notatki</text:p>
          </table:table-cell>
          <table:table-cell table:style-name="Tabela5.B2" office:value-type="string">
            <text:p text:style-name="P38">-</text:p>
          </table:table-cell>
        </table:table-row>
      </table:table>
      <text:p text:style-name="P3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1">Nazwa</text:p>
          </table:table-cell>
          <table:table-cell table:style-name="Tabela15.B1" office:value-type="string">
            <text:p text:style-name="P42">Lokalizacja przesyłki</text:p>
          </table:table-cell>
        </table:table-row>
        <table:table-row>
          <table:table-cell table:style-name="Tabela15.A2" office:value-type="string">
            <text:p text:style-name="P31">Numer</text:p>
          </table:table-cell>
          <table:table-cell table:style-name="Tabela15.B2" office:value-type="string">
            <text:p text:style-name="P42">5</text:p>
          </table:table-cell>
        </table:table-row>
        <table:table-row>
          <table:table-cell table:style-name="Tabela15.A2" office:value-type="string">
            <text:p text:style-name="P31">Aktorzy</text:p>
          </table:table-cell>
          <table:table-cell table:style-name="Tabela15.B2" office:value-type="string">
            <text:p text:style-name="P42">Odbiorca</text:p>
          </table:table-cell>
        </table:table-row>
        <table:table-row>
          <table:table-cell table:style-name="Tabela15.A2" office:value-type="string">
            <text:p text:style-name="P31">Krótki opis</text:p>
          </table:table-cell>
          <table:table-cell table:style-name="Tabela15.B2" office:value-type="string">
            <text:p text:style-name="P42">Odbiorca sprawdza stan jego przesyłki</text:p>
          </table:table-cell>
        </table:table-row>
        <table:table-row>
          <table:table-cell table:style-name="Tabela15.A2" office:value-type="string">
            <text:p text:style-name="P31">Warunki wstępne</text:p>
          </table:table-cell>
          <table:table-cell table:style-name="Tabela15.B2" office:value-type="string">
            <text:list text:style-name="L14">
              <text:list-item>
                <text:p text:style-name="P94">Przesyłka musi istnieć</text:p>
              </text:list-item>
            </text:list>
          </table:table-cell>
        </table:table-row>
        <table:table-row>
          <table:table-cell table:style-name="Tabela15.A2" office:value-type="string">
            <text:p text:style-name="P31">Warunki końcowe</text:p>
          </table:table-cell>
          <table:table-cell table:style-name="Tabela15.B2" office:value-type="string">
            <text:p text:style-name="P42">Odbiorca otrzymuje pożądane informacje</text:p>
          </table:table-cell>
        </table:table-row>
        <table:table-row>
          <table:table-cell table:style-name="Tabela15.A2" office:value-type="string">
            <text:p text:style-name="P31">Główny przepływ zdarzeń</text:p>
          </table:table-cell>
          <table:table-cell table:style-name="Tabela15.B2" office:value-type="string">
            <text:list text:style-name="L15">
              <text:list-item>
                <text:p text:style-name="P95">Odbiorca wpisuje numer przesyłki</text:p>
              </text:list-item>
              <text:list-item>
                <text:p text:style-name="P95">System wyświetla stan w którym znajduje się przesyłka</text:p>
              </text:list-item>
            </text:list>
          </table:table-cell>
        </table:table-row>
        <table:table-row>
          <table:table-cell table:style-name="Tabela15.A2" office:value-type="string">
            <text:p text:style-name="P31">Alternatywne przepływy <text:span text:style-name="T32">zdarzeń</text:span></text:p>
          </table:table-cell>
          <table:table-cell table:style-name="Tabela15.B2" office:value-type="string">
            <text:p text:style-name="P42">1b. Niepoprawny numer przesyłki</text:p>
            <text:list text:style-name="L16">
              <text:list-item>
                <text:p text:style-name="P96">System wyświetla błąd i prosi o podanie poprawnego numeru.</text:p>
              </text:list-item>
            </text:list>
            <text:p text:style-name="P42">2b. Przesyłka jest „<text:span text:style-name="T35">W trasie</text:span>” <text:span text:style-name="T35">lub „W sortowni”</text:span></text:p>
            <text:list text:style-name="L17">
              <text:list-item>
                <text:p text:style-name="P97">System wyświetla geolokalizację danej sortowni lub kuriera</text:p>
              </text:list-item>
            </text:list>
          </table:table-cell>
        </table:table-row>
        <table:table-row>
          <table:table-cell table:style-name="Tabela15.A2" office:value-type="string">
            <text:p text:style-name="P31">Specjalne wymagania</text:p>
          </table:table-cell>
          <table:table-cell table:style-name="Tabela15.B2" office:value-type="string">
            <text:p text:style-name="P38">-</text:p>
          </table:table-cell>
        </table:table-row>
        <table:table-row table:style-name="Tabela15.10">
          <table:table-cell table:style-name="Tabela15.A2" office:value-type="string">
            <text:p text:style-name="P31">Notatki</text:p>
          </table:table-cell>
          <table:table-cell table:style-name="Tabela15.B2" office:value-type="string">
            <text:p text:style-name="P38">-</text:p>
          </table:table-cell>
        </table:table-row>
      </table:table>
      <text:p text:style-name="P30"/>
      <text:p text:style-name="P30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31">Nazwa</text:p>
          </table:table-cell>
          <table:table-cell table:style-name="Tabela16.B1" office:value-type="string">
            <text:p text:style-name="P44">Żądanie zwrotu</text:p>
          </table:table-cell>
        </table:table-row>
        <table:table-row>
          <table:table-cell table:style-name="Tabela16.A2" office:value-type="string">
            <text:p text:style-name="P31">Numer</text:p>
          </table:table-cell>
          <table:table-cell table:style-name="Tabela16.B2" office:value-type="string">
            <text:p text:style-name="P44">6</text:p>
          </table:table-cell>
        </table:table-row>
        <table:table-row>
          <table:table-cell table:style-name="Tabela16.A2" office:value-type="string">
            <text:p text:style-name="P31">Aktorzy</text:p>
          </table:table-cell>
          <table:table-cell table:style-name="Tabela16.B2" office:value-type="string">
            <text:p text:style-name="P45">Odbiorca</text:p>
          </table:table-cell>
        </table:table-row>
        <table:table-row>
          <table:table-cell table:style-name="Tabela16.A2" office:value-type="string">
            <text:p text:style-name="P31">Krótki opis</text:p>
          </table:table-cell>
          <table:table-cell table:style-name="Tabela16.B2" office:value-type="string">
            <text:p text:style-name="P45">Odbiorca wysyła żądanie odesłania przesyłki do nadawcy</text:p>
          </table:table-cell>
        </table:table-row>
        <table:table-row table:style-name="Tabela16.5">
          <table:table-cell table:style-name="Tabela16.A2" office:value-type="string">
            <text:p text:style-name="P31">Warunki wstępne</text:p>
          </table:table-cell>
          <table:table-cell table:style-name="Tabela16.B2" office:value-type="string">
            <text:p text:style-name="P45">Przesyłka została odebrana</text:p>
          </table:table-cell>
        </table:table-row>
        <table:table-row>
          <table:table-cell table:style-name="Tabela16.A2" office:value-type="string">
            <text:p text:style-name="P31">Warunki końcowe</text:p>
          </table:table-cell>
          <table:table-cell table:style-name="Tabela16.B2" office:value-type="string">
            <text:p text:style-name="P45">Przesyłka zostaje nadana ponownie, tym razem z odwróconymi adresami nadawcy i odbiorcy</text:p>
          </table:table-cell>
        </table:table-row>
        <table:table-row>
          <table:table-cell table:style-name="Tabela16.A2" office:value-type="string">
            <text:p text:style-name="P31">Główny przepływ zdarzeń</text:p>
          </table:table-cell>
          <table:table-cell table:style-name="Tabela16.B2" office:value-type="string">
            <text:list text:style-name="L18">
              <text:list-item>
                <text:p text:style-name="P98">Odbiorca wypełnia formularz zwrotu</text:p>
              </text:list-item>
              <text:list-item>
                <text:p text:style-name="P98">Formularz zostaje przesłany a dane zweryfikowane</text:p>
              </text:list-item>
              <text:list-item>
                <text:p text:style-name="P79">Przesyłka zostaje dodana do rejestru</text:p>
              </text:list-item>
              <text:list-item>
                <text:p text:style-name="P79">System generuje etykietę dla tej przesyłki</text:p>
              </text:list-item>
              <text:list-item>
                <text:p text:style-name="P86">System wyświetla numer paczki oraz link do pobrania pliku z etykietą</text:p>
              </text:list-item>
            </text:list>
          </table:table-cell>
        </table:table-row>
        <table:table-row>
          <table:table-cell table:style-name="Tabela16.A2" office:value-type="string">
            <text:p text:style-name="P31">Alternatywne przepływy <text:span text:style-name="T32">zdarzeń</text:span></text:p>
          </table:table-cell>
          <table:table-cell table:style-name="Tabela16.B2" office:value-type="string">
            <text:p text:style-name="P45">2b. Nadawca posiada konto stałego nadawcy</text:p>
            <text:list text:style-name="L19">
              <text:list-item>
                <text:p text:style-name="P99">Zamiast nadania paczki, <text:span text:style-name="T36">żądanie zwrotu trafia na listę oczekujących zwrotów danego nadawcy</text:span></text:p>
              </text:list-item>
            </text:list>
            <text:p text:style-name="P34"><text:span text:style-name="T36">2c</text:span>. Nadawca podał niepoprawne dane.</text:p>
            <text:list text:continue-list="list4059685398" text:style-name="L2">
              <text:list-item>
                <text:p text:style-name="P81">System odmawia wysłania formularza i podświetla niepoprawne pola</text:p>
              </text:list-item>
            </text:list>
          </table:table-cell>
        </table:table-row>
        <table:table-row>
          <table:table-cell table:style-name="Tabela16.A2" office:value-type="string">
            <text:p text:style-name="P31">Specjalne wymagania</text:p>
          </table:table-cell>
          <table:table-cell table:style-name="Tabela16.B2" office:value-type="string">
            <text:p text:style-name="P43">-</text:p>
          </table:table-cell>
        </table:table-row>
        <table:table-row table:style-name="Tabela16.10">
          <table:table-cell table:style-name="Tabela16.A2" office:value-type="string">
            <text:p text:style-name="P31">Notatki</text:p>
          </table:table-cell>
          <table:table-cell table:style-name="Tabela16.B2" office:value-type="string">
            <text:p text:style-name="P38">-</text:p>
          </table:table-cell>
        </table:table-row>
      </table:table>
      <text:p text:style-name="P30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31">Nazwa</text:p>
          </table:table-cell>
          <table:table-cell table:style-name="Tabela6.B1" office:value-type="string">
            <text:p text:style-name="P46">Logowanie</text:p>
          </table:table-cell>
        </table:table-row>
        <table:table-row>
          <table:table-cell table:style-name="Tabela6.A2" office:value-type="string">
            <text:p text:style-name="P31">Numer</text:p>
          </table:table-cell>
          <table:table-cell table:style-name="Tabela6.B2" office:value-type="string">
            <text:p text:style-name="P46">7</text:p>
          </table:table-cell>
        </table:table-row>
        <table:table-row>
          <table:table-cell table:style-name="Tabela6.A2" office:value-type="string">
            <text:p text:style-name="P31">Aktorzy</text:p>
          </table:table-cell>
          <table:table-cell table:style-name="Tabela6.B2" office:value-type="string">
            <text:p text:style-name="P46">Użytkownik</text:p>
          </table:table-cell>
        </table:table-row>
        <table:table-row>
          <table:table-cell table:style-name="Tabela6.A2" office:value-type="string">
            <text:p text:style-name="P31">Krótki opis</text:p>
          </table:table-cell>
          <table:table-cell table:style-name="Tabela6.B2" office:value-type="string">
            <text:p text:style-name="P46">Logowanie do systemu</text:p>
          </table:table-cell>
        </table:table-row>
        <table:table-row>
          <table:table-cell table:style-name="Tabela6.A2" office:value-type="string">
            <text:p text:style-name="P31">Warunki wstępne</text:p>
          </table:table-cell>
          <table:table-cell table:style-name="Tabela6.B2" office:value-type="string">
            <text:p text:style-name="P46">Istnieje konto użytkownika</text:p>
          </table:table-cell>
        </table:table-row>
        <table:table-row>
          <table:table-cell table:style-name="Tabela6.A2" office:value-type="string">
            <text:p text:style-name="P31">Warunki końcowe</text:p>
          </table:table-cell>
          <table:table-cell table:style-name="Tabela6.B2" office:value-type="string">
            <text:p text:style-name="P46">Użytkownik otrzymuje dostęp do przydzielonych mu funkcji systemu</text:p>
          </table:table-cell>
        </table:table-row>
        <table:table-row>
          <table:table-cell table:style-name="Tabela6.A2" office:value-type="string">
            <text:p text:style-name="P31">Główny przepływ zdarzeń</text:p>
          </table:table-cell>
          <table:table-cell table:style-name="Tabela6.B2" office:value-type="string">
            <text:list text:style-name="Numbering_20_123">
              <text:list-item>
                <text:p text:style-name="P100">Użytkownik podaje login <text:span text:style-name="T37">i</text:span> hasło do konta</text:p>
              </text:list-item>
              <text:list-item>
                <text:p text:style-name="P107">System weryfikuje przekazany login i hasło</text:p>
              </text:list-item>
              <text:list-item>
                <text:p text:style-name="P107">Zostaje przeprowadzona weryfikacja dwuetapowa</text:p>
              </text:list-item>
              <text:list-item>
                <text:p text:style-name="P107">Użytkownik zostaje zalogowany</text:p>
              </text:list-item>
            </text:list>
          </table:table-cell>
        </table:table-row>
        <table:table-row>
          <table:table-cell table:style-name="Tabela6.A2" office:value-type="string">
            <text:p text:style-name="P31">Alternatywne przepływy <text:span text:style-name="T32">zdarzeń</text:span></text:p>
          </table:table-cell>
          <table:table-cell table:style-name="Tabela6.B2" office:value-type="string">
            <text:p text:style-name="P34"><text:span text:style-name="T37">2</text:span>b. <text:span text:style-name="T37">Użytkownik podał niepoprawny login</text:span></text:p>
            <text:list text:style-name="L20">
              <text:list-item>
                <text:p text:style-name="P108">System prosi o podanie loginu ponownie</text:p>
              </text:list-item>
            </text:list>
            <text:p text:style-name="P47">2c. Użytkownik podał niepoprawne hasło</text:p>
            <text:list text:style-name="L21">
              <text:list-item>
                <text:p text:style-name="P109">System prosi o podanie hasła ponownie</text:p>
              </text:list-item>
            </text:list>
            <text:p text:style-name="P47">3b. Weryfikacja dwuetapowa nie powodzi się</text:p>
            <text:list text:style-name="L22">
              <text:list-item>
                <text:p text:style-name="P110">System wyświetla komunikat o błędzie</text:p>
              </text:list-item>
              <text:list-item>
                <text:p text:style-name="P110">System przenosi użytkownika do strony logowania</text:p>
              </text:list-item>
              <text:list-item>
                <text:p text:style-name="P110">Użytkownik otrzymuje e-mail z ostrzeżeniem o próbie zalogowania na jego konto </text:p>
              </text:list-item>
            </text:list>
          </table:table-cell>
        </table:table-row>
        <table:table-row>
          <table:table-cell table:style-name="Tabela6.A2" office:value-type="string">
            <text:p text:style-name="P31">Specjalne wymagania</text:p>
          </table:table-cell>
          <table:table-cell table:style-name="Tabela6.B2" office:value-type="string">
            <text:p text:style-name="P48">Wsparcie dla wielu systemów weryfikacji dwuetapowej</text:p>
          </table:table-cell>
        </table:table-row>
        <table:table-row table:style-name="Tabela6.10">
          <table:table-cell table:style-name="Tabela6.A2" office:value-type="string">
            <text:p text:style-name="P31">Notatki</text:p>
          </table:table-cell>
          <table:table-cell table:style-name="Tabela6.B2" office:value-type="string">
            <text:p text:style-name="P34">-</text:p>
          </table:table-cell>
        </table:table-row>
      </table:table>
      <text:p text:style-name="P30"/>
      <text:p text:style-name="P3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1">Nazwa</text:p>
          </table:table-cell>
          <table:table-cell table:style-name="Tabela7.B1" office:value-type="string">
            <text:p text:style-name="P49">Akceptacja zwrotu</text:p>
          </table:table-cell>
        </table:table-row>
        <table:table-row>
          <table:table-cell table:style-name="Tabela7.A2" office:value-type="string">
            <text:p text:style-name="P31">Numer</text:p>
          </table:table-cell>
          <table:table-cell table:style-name="Tabela7.B2" office:value-type="string">
            <text:p text:style-name="P48">8</text:p>
          </table:table-cell>
        </table:table-row>
        <table:table-row>
          <table:table-cell table:style-name="Tabela7.A2" office:value-type="string">
            <text:p text:style-name="P31">Aktorzy</text:p>
          </table:table-cell>
          <table:table-cell table:style-name="Tabela7.B2" office:value-type="string">
            <text:p text:style-name="P49">Stały nadawca</text:p>
          </table:table-cell>
        </table:table-row>
        <table:table-row>
          <table:table-cell table:style-name="Tabela7.A2" office:value-type="string">
            <text:p text:style-name="P31">Krótki opis</text:p>
          </table:table-cell>
          <table:table-cell table:style-name="Tabela7.B2" office:value-type="string">
            <text:p text:style-name="P49">Stały nadawca akceptuje żądanie zwrotu</text:p>
          </table:table-cell>
        </table:table-row>
        <table:table-row>
          <table:table-cell table:style-name="Tabela7.A2" office:value-type="string">
            <text:p text:style-name="P31">Warunki wstępne</text:p>
          </table:table-cell>
          <table:table-cell table:style-name="Tabela7.B2" office:value-type="string">
            <text:p text:style-name="P49">Lista żądań zwrotu stałego nadawcy nie jest pusta</text:p>
          </table:table-cell>
        </table:table-row>
        <table:table-row>
          <table:table-cell table:style-name="Tabela7.A2" office:value-type="string">
            <text:p text:style-name="P31">Warunki końcowe</text:p>
          </table:table-cell>
          <table:table-cell table:style-name="Tabela7.B2" office:value-type="string">
            <text:p text:style-name="P49">Paczka ze zwrotem zostaje nadana, a żądanie zwrotu zostaje usunięte z listy żądań zwrotu</text:p>
          </table:table-cell>
        </table:table-row>
        <table:table-row>
          <table:table-cell table:style-name="Tabela7.A2" office:value-type="string">
            <text:p text:style-name="P31">Główny przepływ zdarzeń</text:p>
          </table:table-cell>
          <table:table-cell table:style-name="Tabela7.B2" office:value-type="string">
            <text:list text:style-name="L23">
              <text:list-item>
                <text:p text:style-name="P101"><text:span text:style-name="T38">Stały nadawca loguje się na </text:span><text:span text:style-name="T39">swoje konto</text:span></text:p>
              </text:list-item>
              <text:list-item>
                <text:p text:style-name="P111">Stały nadawca wybiera z listy zwrotów konkretną pozycję</text:p>
              </text:list-item>
              <text:list-item>
                <text:p text:style-name="P111">Stały nadawca wybiera opcję akceptacji zwrotu</text:p>
              </text:list-item>
              <text:list-item>
                <text:p text:style-name="P111">Zostaje nadana paczka przy użyciu danych z formularza zwrotów</text:p>
              </text:list-item>
              <text:list-item>
                <text:p text:style-name="P111">Żądanie zwrotu zostaje usunięte z listy</text:p>
              </text:list-item>
            </text:list>
          </table:table-cell>
        </table:table-row>
        <table:table-row>
          <table:table-cell table:style-name="Tabela7.A2" office:value-type="string">
            <text:p text:style-name="P31">Alternatywne przepływy <text:span text:style-name="T32">zdarzeń</text:span></text:p>
          </table:table-cell>
          <table:table-cell table:style-name="Tabela7.B2" office:value-type="string">
            <text:p text:style-name="P48">-</text:p>
          </table:table-cell>
        </table:table-row>
        <table:table-row>
          <table:table-cell table:style-name="Tabela7.A2" office:value-type="string">
            <text:p text:style-name="P31">Specjalne wymagania</text:p>
          </table:table-cell>
          <table:table-cell table:style-name="Tabela7.B2" office:value-type="string">
            <text:p text:style-name="P50">-</text:p>
          </table:table-cell>
        </table:table-row>
        <table:table-row table:style-name="Tabela7.10">
          <table:table-cell table:style-name="Tabela7.A2" office:value-type="string">
            <text:p text:style-name="P31">Notatki</text:p>
          </table:table-cell>
          <table:table-cell table:style-name="Tabela7.B2" office:value-type="string">
            <text:p text:style-name="P50">Zwracający otrzymuje e-mail z potwierdzeniem akceptacji zwrotu oraz etykietą paczki</text:p>
          </table:table-cell>
        </table:table-row>
      </table:table>
      <text:p text:style-name="P30"/>
      <text:p text:style-name="P30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31">Nazwa</text:p>
          </table:table-cell>
          <table:table-cell table:style-name="Tabela8.B1" office:value-type="string">
            <text:p text:style-name="P49"><text:span text:style-name="T39">Odmowa</text:span> zwrotu</text:p>
          </table:table-cell>
        </table:table-row>
        <table:table-row>
          <table:table-cell table:style-name="Tabela8.A2" office:value-type="string">
            <text:p text:style-name="P31">Numer</text:p>
          </table:table-cell>
          <table:table-cell table:style-name="Tabela8.B2" office:value-type="string">
            <text:p text:style-name="P50">9</text:p>
          </table:table-cell>
        </table:table-row>
        <table:table-row>
          <table:table-cell table:style-name="Tabela8.A2" office:value-type="string">
            <text:p text:style-name="P31">Aktorzy</text:p>
          </table:table-cell>
          <table:table-cell table:style-name="Tabela8.B2" office:value-type="string">
            <text:p text:style-name="P49">Stały nadawca</text:p>
          </table:table-cell>
        </table:table-row>
        <table:table-row>
          <table:table-cell table:style-name="Tabela8.A2" office:value-type="string">
            <text:p text:style-name="P31">Krótki opis</text:p>
          </table:table-cell>
          <table:table-cell table:style-name="Tabela8.B2" office:value-type="string">
            <text:p text:style-name="P49">Stały nadawca <text:span text:style-name="T39">odrzuca żądanie zwrotu</text:span></text:p>
          </table:table-cell>
        </table:table-row>
        <table:table-row>
          <table:table-cell table:style-name="Tabela8.A2" office:value-type="string">
            <text:p text:style-name="P31">Warunki wstępne</text:p>
          </table:table-cell>
          <table:table-cell table:style-name="Tabela8.B2" office:value-type="string">
            <text:p text:style-name="P49">Lista żądań zwrotu stałego nadawcy nie jest pusta</text:p>
          </table:table-cell>
        </table:table-row>
        <table:table-row>
          <table:table-cell table:style-name="Tabela8.A2" office:value-type="string">
            <text:p text:style-name="P31">Warunki końcowe</text:p>
          </table:table-cell>
          <table:table-cell table:style-name="Tabela8.B2" office:value-type="string">
            <text:p text:style-name="P49"><text:span text:style-name="T39">Ż</text:span>ądanie zwrotu zostaje usunięte z listy żądań zwrotu</text:p>
          </table:table-cell>
        </table:table-row>
        <table:table-row>
          <table:table-cell table:style-name="Tabela8.A2" office:value-type="string">
            <text:p text:style-name="P31">Główny przepływ zdarzeń</text:p>
          </table:table-cell>
          <table:table-cell table:style-name="Tabela8.B2" office:value-type="string">
            <text:list text:style-name="L24">
              <text:list-item>
                <text:p text:style-name="P102"><text:span text:style-name="T38">Stały nadawca loguje się na </text:span><text:span text:style-name="T39">swoje konto</text:span></text:p>
              </text:list-item>
              <text:list-item>
                <text:p text:style-name="P112">Stały nadawca wybiera z listy zwrotów konkretną pozycję</text:p>
              </text:list-item>
              <text:list-item>
                <text:p text:style-name="P112">Stały nadawca wybiera opcję odmowy zwrotu</text:p>
              </text:list-item>
              <text:list-item>
                <text:p text:style-name="P112">Żądanie zwrotu zostaje usunięte z listy</text:p>
              </text:list-item>
            </text:list>
          </table:table-cell>
        </table:table-row>
        <table:table-row>
          <table:table-cell table:style-name="Tabela8.A2" office:value-type="string">
            <text:p text:style-name="P31">Alternatywne przepływy <text:span text:style-name="T32">zdarzeń</text:span></text:p>
          </table:table-cell>
          <table:table-cell table:style-name="Tabela8.B2" office:value-type="string">
            <text:p text:style-name="P48">-</text:p>
          </table:table-cell>
        </table:table-row>
        <table:table-row>
          <table:table-cell table:style-name="Tabela8.A2" office:value-type="string">
            <text:p text:style-name="P31">Specjalne wymagania</text:p>
          </table:table-cell>
          <table:table-cell table:style-name="Tabela8.B2" office:value-type="string">
            <text:p text:style-name="P50">-</text:p>
          </table:table-cell>
        </table:table-row>
        <table:table-row table:style-name="Tabela8.10">
          <table:table-cell table:style-name="Tabela8.A2" office:value-type="string">
            <text:p text:style-name="P31">Notatki</text:p>
          </table:table-cell>
          <table:table-cell table:style-name="Tabela8.B2" office:value-type="string">
            <text:p text:style-name="P50">Zwracający otrzymuje e-mail z informacją o odmowie zwrotu</text:p>
          </table:table-cell>
        </table:table-row>
      </table:table>
      <text:p text:style-name="P30"/>
      <text:p text:style-name="P3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31">Nazwa</text:p>
          </table:table-cell>
          <table:table-cell table:style-name="Tabela9.B1" office:value-type="string">
            <text:p text:style-name="P50">Pobierz listę zwrotów</text:p>
          </table:table-cell>
        </table:table-row>
        <table:table-row>
          <table:table-cell table:style-name="Tabela9.A2" office:value-type="string">
            <text:p text:style-name="P31">Numer</text:p>
          </table:table-cell>
          <table:table-cell table:style-name="Tabela9.B2" office:value-type="string">
            <text:p text:style-name="P50">10</text:p>
          </table:table-cell>
        </table:table-row>
        <table:table-row>
          <table:table-cell table:style-name="Tabela9.A2" office:value-type="string">
            <text:p text:style-name="P31">Aktorzy</text:p>
          </table:table-cell>
          <table:table-cell table:style-name="Tabela9.B2" office:value-type="string">
            <text:p text:style-name="P49">Stały nadawca</text:p>
          </table:table-cell>
        </table:table-row>
        <table:table-row>
          <table:table-cell table:style-name="Tabela9.A2" office:value-type="string">
            <text:p text:style-name="P31">Krótki opis</text:p>
          </table:table-cell>
          <table:table-cell table:style-name="Tabela9.B2" office:value-type="string">
            <text:p text:style-name="P49">Stały nadawca <text:span text:style-name="T39">otrzymuje listę zwrotów</text:span></text:p>
          </table:table-cell>
        </table:table-row>
        <table:table-row>
          <table:table-cell table:style-name="Tabela9.A2" office:value-type="string">
            <text:p text:style-name="P31">Warunki wstępne</text:p>
          </table:table-cell>
          <table:table-cell table:style-name="Tabela9.B2" office:value-type="string">
            <text:p text:style-name="P49"/>
          </table:table-cell>
        </table:table-row>
        <table:table-row>
          <table:table-cell table:style-name="Tabela9.A2" office:value-type="string">
            <text:p text:style-name="P31">Warunki końcowe</text:p>
          </table:table-cell>
          <table:table-cell table:style-name="Tabela9.B2" office:value-type="string">
            <text:p text:style-name="P51">Stały nadawca ma podgląd oczekujących zwrotów</text:p>
          </table:table-cell>
        </table:table-row>
        <table:table-row>
          <table:table-cell table:style-name="Tabela9.A2" office:value-type="string">
            <text:p text:style-name="P31">Główny przepływ zdarzeń</text:p>
          </table:table-cell>
          <table:table-cell table:style-name="Tabela9.B2" office:value-type="string">
            <text:list text:style-name="L25">
              <text:list-item>
                <text:p text:style-name="P103"><text:span text:style-name="T38">Stały nadawca loguje się na </text:span><text:span text:style-name="T39">swoje konto</text:span></text:p>
              </text:list-item>
              <text:list-item>
                <text:p text:style-name="P113">Stały nadawca <text:span text:style-name="T40">wybiera opcję wyświetlenia listy zwrotów</text:span></text:p>
              </text:list-item>
              <text:list-item>
                <text:p text:style-name="P114">System wyświetla listę wszystkich oczekujących zwrotów dla konta stałego nadawcy</text:p>
              </text:list-item>
            </text:list>
          </table:table-cell>
        </table:table-row>
        <table:table-row>
          <table:table-cell table:style-name="Tabela9.A2" office:value-type="string">
            <text:p text:style-name="P31">Alternatywne przepływy <text:span text:style-name="T32">zdarzeń</text:span></text:p>
          </table:table-cell>
          <table:table-cell table:style-name="Tabela9.B2" office:value-type="string">
            <text:p text:style-name="P51">3b. Lista zwrotów jest pusta</text:p>
            <text:list text:style-name="L26">
              <text:list-item>
                <text:p text:style-name="P115">System wyświetla informację o braku oczekujących zwrotów</text:p>
              </text:list-item>
            </text:list>
          </table:table-cell>
        </table:table-row>
        <table:table-row>
          <table:table-cell table:style-name="Tabela9.A2" office:value-type="string">
            <text:p text:style-name="P31">Specjalne wymagania</text:p>
          </table:table-cell>
          <table:table-cell table:style-name="Tabela9.B2" office:value-type="string">
            <text:p text:style-name="P50">-</text:p>
          </table:table-cell>
        </table:table-row>
        <table:table-row table:style-name="Tabela9.10">
          <table:table-cell table:style-name="Tabela9.A2" office:value-type="string">
            <text:p text:style-name="P31">Notatki</text:p>
          </table:table-cell>
          <table:table-cell table:style-name="Tabela9.B2" office:value-type="string">
            <text:p text:style-name="P50">-</text:p>
          </table:table-cell>
        </table:table-row>
      </table:table>
      <text:p text:style-name="P30"/>
      <text:p text:style-name="P3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1">Nazwa</text:p>
          </table:table-cell>
          <table:table-cell table:style-name="Tabela10.B1" office:value-type="string">
            <text:p text:style-name="P51">Stworzenie konta</text:p>
          </table:table-cell>
        </table:table-row>
        <table:table-row>
          <table:table-cell table:style-name="Tabela10.A2" office:value-type="string">
            <text:p text:style-name="P31">Numer</text:p>
          </table:table-cell>
          <table:table-cell table:style-name="Tabela10.B2" office:value-type="string">
            <text:p text:style-name="P50">1<text:span text:style-name="T40">1</text:span></text:p>
          </table:table-cell>
        </table:table-row>
        <table:table-row>
          <table:table-cell table:style-name="Tabela10.A2" office:value-type="string">
            <text:p text:style-name="P31">Aktorzy</text:p>
          </table:table-cell>
          <table:table-cell table:style-name="Tabela10.B2" office:value-type="string">
            <text:p text:style-name="P51">Administrator, <text:span text:style-name="T41">nowy użytkownik</text:span></text:p>
          </table:table-cell>
        </table:table-row>
        <table:table-row>
          <table:table-cell table:style-name="Tabela10.A2" office:value-type="string">
            <text:p text:style-name="P31">Krótki opis</text:p>
          </table:table-cell>
          <table:table-cell table:style-name="Tabela10.B2" office:value-type="string">
            <text:p text:style-name="P51">Administrator tworzy konto dla zatrudnionego kuriera</text:p>
          </table:table-cell>
        </table:table-row>
        <table:table-row>
          <table:table-cell table:style-name="Tabela10.A2" office:value-type="string">
            <text:p text:style-name="P31">Warunki <text:soft-page-break/>wstępne</text:p>
          </table:table-cell>
          <table:table-cell table:style-name="Tabela10.B2" office:value-type="string">
            <text:p text:style-name="P51"><text:span text:style-name="T41">Użytkownik</text:span> nie posiada konta w systemie</text:p>
          </table:table-cell>
        </table:table-row>
        <table:table-row>
          <table:table-cell table:style-name="Tabela10.A2" office:value-type="string">
            <text:p text:style-name="P31">Warunki końcowe</text:p>
          </table:table-cell>
          <table:table-cell table:style-name="Tabela10.B2" office:value-type="string">
            <text:p text:style-name="P51"><text:span text:style-name="T41">Użytkownik</text:span> otrzymuje dostęp do własnego konta</text:p>
          </table:table-cell>
        </table:table-row>
        <table:table-row>
          <table:table-cell table:style-name="Tabela10.A2" office:value-type="string">
            <text:p text:style-name="P31">Główny przepływ zdarzeń</text:p>
          </table:table-cell>
          <table:table-cell table:style-name="Tabela10.B2" office:value-type="string">
            <text:list text:style-name="L27">
              <text:list-item>
                <text:p text:style-name="P116">Administrator loguje się do systemu</text:p>
              </text:list-item>
              <text:list-item>
                <text:p text:style-name="P116">Administrator wprowadza dane <text:span text:style-name="T41">użytkownika</text:span></text:p>
              </text:list-item>
              <text:list-item>
                <text:p text:style-name="P116">Administrator nadaje <text:span text:style-name="T41">kontu odpowiednie uprawnienia</text:span></text:p>
              </text:list-item>
              <text:list-item>
                <text:p text:style-name="P116">Następuje wygenerowanie tymczasowego hasła dla konta</text:p>
              </text:list-item>
              <text:list-item>
                <text:p text:style-name="P116">Administrator przekazuje dane logowania <text:span text:style-name="T41">użytkownikowi</text:span> oraz prośbę o zmianę hasła</text:p>
              </text:list-item>
            </text:list>
          </table:table-cell>
        </table:table-row>
        <table:table-row>
          <table:table-cell table:style-name="Tabela10.A2" office:value-type="string">
            <text:p text:style-name="P31">Alternatywne przepływy <text:span text:style-name="T32">zdarzeń</text:span></text:p>
          </table:table-cell>
          <table:table-cell table:style-name="Tabela10.B2" office:value-type="string">
            <text:p text:style-name="P52">3a. Użytkownik jest kurierem</text:p>
            <text:list text:style-name="L28">
              <text:list-item>
                <text:p text:style-name="P117">Użytkownik otrzymuje uprawnienia kuriera</text:p>
              </text:list-item>
            </text:list>
            <text:p text:style-name="P52">3b. Użytkownik jest nowym administratorem</text:p>
            <text:list text:style-name="L29">
              <text:list-item>
                <text:p text:style-name="P118">Użytkownik otrzymuje uprawnienia administratora</text:p>
              </text:list-item>
            </text:list>
            <text:p text:style-name="P52">3c. Użytkownik jest stałym nadawcą</text:p>
            <text:list text:style-name="L30">
              <text:list-item>
                <text:p text:style-name="P119">Użytkownik otrzymuje uprawnienia stałego nadawcy</text:p>
              </text:list-item>
            </text:list>
          </table:table-cell>
        </table:table-row>
        <table:table-row>
          <table:table-cell table:style-name="Tabela10.A2" office:value-type="string">
            <text:p text:style-name="P31">Specjalne wymagania</text:p>
          </table:table-cell>
          <table:table-cell table:style-name="Tabela10.B2" office:value-type="string">
            <text:p text:style-name="P50">-</text:p>
          </table:table-cell>
        </table:table-row>
        <table:table-row table:style-name="Tabela10.10">
          <table:table-cell table:style-name="Tabela10.A2" office:value-type="string">
            <text:p text:style-name="P31">Notatki</text:p>
          </table:table-cell>
          <table:table-cell table:style-name="Tabela10.B2" office:value-type="string">
            <text:p text:style-name="P27">-</text:p>
          </table:table-cell>
        </table:table-row>
      </table:table>
      <text:p text:style-name="P30"/>
      <text:p text:style-name="P3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1">Nazwa</text:p>
          </table:table-cell>
          <table:table-cell table:style-name="Tabela11.B1" office:value-type="string">
            <text:p text:style-name="P52">Usunięcie konta</text:p>
          </table:table-cell>
        </table:table-row>
        <table:table-row>
          <table:table-cell table:style-name="Tabela11.A2" office:value-type="string">
            <text:p text:style-name="P31">Numer</text:p>
          </table:table-cell>
          <table:table-cell table:style-name="Tabela11.B2" office:value-type="string">
            <text:p text:style-name="P50">1<text:span text:style-name="T41">2</text:span></text:p>
          </table:table-cell>
        </table:table-row>
        <table:table-row>
          <table:table-cell table:style-name="Tabela11.A2" office:value-type="string">
            <text:p text:style-name="P31">Aktorzy</text:p>
          </table:table-cell>
          <table:table-cell table:style-name="Tabela11.B2" office:value-type="string">
            <text:p text:style-name="P52">Administrator, użytkownik</text:p>
          </table:table-cell>
        </table:table-row>
        <table:table-row>
          <table:table-cell table:style-name="Tabela11.A2" office:value-type="string">
            <text:p text:style-name="P31">Krótki opis</text:p>
          </table:table-cell>
          <table:table-cell table:style-name="Tabela11.B2" office:value-type="string">
            <text:p text:style-name="P52">Konto użytkownika zostaje usunięte</text:p>
          </table:table-cell>
        </table:table-row>
        <table:table-row>
          <table:table-cell table:style-name="Tabela11.A2" office:value-type="string">
            <text:p text:style-name="P31">Warunki wstępne</text:p>
          </table:table-cell>
          <table:table-cell table:style-name="Tabela11.B2" office:value-type="string">
            <text:p text:style-name="P52">Konto istnieje</text:p>
          </table:table-cell>
        </table:table-row>
        <table:table-row>
          <table:table-cell table:style-name="Tabela11.A2" office:value-type="string">
            <text:p text:style-name="P31">Warunki końcowe</text:p>
          </table:table-cell>
          <table:table-cell table:style-name="Tabela11.B2" office:value-type="string">
            <text:p text:style-name="P52">Konto zostało pomyślnie usunięte</text:p>
          </table:table-cell>
        </table:table-row>
        <table:table-row>
          <table:table-cell table:style-name="Tabela11.A2" office:value-type="string">
            <text:p text:style-name="P31">Główny przepływ zdarzeń</text:p>
          </table:table-cell>
          <table:table-cell table:style-name="Tabela11.B2" office:value-type="string">
            <text:list text:style-name="L31">
              <text:list-item>
                <text:p text:style-name="P104"><text:span text:style-name="T41">Administrator loguje się </text:span><text:span text:style-name="T42">na swoje konto</text:span></text:p>
              </text:list-item>
              <text:list-item>
                <text:p text:style-name="P120">Administrator wybiera opcję usunięcia konta dla danego użytkownika</text:p>
              </text:list-item>
              <text:list-item>
                <text:p text:style-name="P120">Konto zostaje usunięte</text:p>
              </text:list-item>
              <text:list-item>
                <text:p text:style-name="P120">Użytkownik otrzymuje maila z informacją o usunięciu konta</text:p>
              </text:list-item>
            </text:list>
          </table:table-cell>
        </table:table-row>
        <table:table-row>
          <table:table-cell table:style-name="Tabela11.A2" office:value-type="string">
            <text:p text:style-name="P31">Alternatywne przepływy <text:span text:style-name="T32">zdarzeń</text:span></text:p>
          </table:table-cell>
          <table:table-cell table:style-name="Tabela11.B2" office:value-type="string">
            <text:p text:style-name="P51">-</text:p>
          </table:table-cell>
        </table:table-row>
        <table:table-row>
          <table:table-cell table:style-name="Tabela11.A2" office:value-type="string">
            <text:p text:style-name="P31">Specjalne wymagania</text:p>
          </table:table-cell>
          <table:table-cell table:style-name="Tabela11.B2" office:value-type="string">
            <text:p text:style-name="P50">-</text:p>
          </table:table-cell>
        </table:table-row>
        <table:table-row table:style-name="Tabela11.10">
          <table:table-cell table:style-name="Tabela11.A2" office:value-type="string">
            <text:p text:style-name="P31">Notatki</text:p>
          </table:table-cell>
          <table:table-cell table:style-name="Tabela11.B2" office:value-type="string">
            <text:p text:style-name="P50">-</text:p>
          </table:table-cell>
        </table:table-row>
      </table:table>
      <text:p text:style-name="P30"/>
      <text:p text:style-name="P3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1">Nazwa</text:p>
          </table:table-cell>
          <table:table-cell table:style-name="Tabela13.B1" office:value-type="string">
            <text:p text:style-name="P54">Zmiana hasła</text:p>
          </table:table-cell>
        </table:table-row>
        <table:table-row>
          <table:table-cell table:style-name="Tabela13.A2" office:value-type="string">
            <text:p text:style-name="P31">Numer</text:p>
          </table:table-cell>
          <table:table-cell table:style-name="Tabela13.B2" office:value-type="string">
            <text:p text:style-name="P50">1<text:span text:style-name="T43">3</text:span></text:p>
          </table:table-cell>
        </table:table-row>
        <table:table-row>
          <table:table-cell table:style-name="Tabela13.A2" office:value-type="string">
            <text:p text:style-name="P31">Aktorzy</text:p>
          </table:table-cell>
          <table:table-cell table:style-name="Tabela13.B2" office:value-type="string">
            <text:p text:style-name="P55">Użytkownik</text:p>
          </table:table-cell>
        </table:table-row>
        <table:table-row>
          <table:table-cell table:style-name="Tabela13.A2" office:value-type="string">
            <text:p text:style-name="P31">Krótki opis</text:p>
          </table:table-cell>
          <table:table-cell table:style-name="Tabela13.B2" office:value-type="string">
            <text:p text:style-name="P54">Hasło konta konkretnego użytkownika zostaje zmienione</text:p>
          </table:table-cell>
        </table:table-row>
        <table:table-row>
          <table:table-cell table:style-name="Tabela13.A2" office:value-type="string">
            <text:p text:style-name="P31">Warunki wstępne</text:p>
          </table:table-cell>
          <table:table-cell table:style-name="Tabela13.B2" office:value-type="string">
            <text:p text:style-name="P52">Konto istnieje</text:p>
          </table:table-cell>
        </table:table-row>
        <table:table-row>
          <table:table-cell table:style-name="Tabela13.A2" office:value-type="string">
            <text:p text:style-name="P31">Warunki <text:soft-page-break/>końcowe</text:p>
          </table:table-cell>
          <table:table-cell table:style-name="Tabela13.B2" office:value-type="string">
            <text:p text:style-name="P56">Użytkownik posiada nowe hasło</text:p>
          </table:table-cell>
        </table:table-row>
        <table:table-row>
          <table:table-cell table:style-name="Tabela13.A2" office:value-type="string">
            <text:p text:style-name="P31">Główny przepływ zdarzeń</text:p>
          </table:table-cell>
          <table:table-cell table:style-name="Tabela13.B2" office:value-type="string">
            <text:list text:style-name="L32">
              <text:list-item>
                <text:p text:style-name="P123">Przed zalogowaniem się na konto, użytkownik wybiera opcję zmiany hasła</text:p>
              </text:list-item>
              <text:list-item>
                <text:p text:style-name="P124">Na adres e-mail użytkownika zostaje wysłany link do zmiany hasła</text:p>
              </text:list-item>
              <text:list-item>
                <text:p text:style-name="P124">Użytkownik wprowadza nowe hasło</text:p>
              </text:list-item>
              <text:list-item>
                <text:p text:style-name="P124">Hasło zostaje zmienione</text:p>
              </text:list-item>
            </text:list>
          </table:table-cell>
        </table:table-row>
        <table:table-row>
          <table:table-cell table:style-name="Tabela13.A2" office:value-type="string">
            <text:p text:style-name="P31">Alternatywne przepływy <text:span text:style-name="T32">zdarzeń</text:span></text:p>
          </table:table-cell>
          <table:table-cell table:style-name="Tabela13.B2" office:value-type="string">
            <text:p text:style-name="P56">1b. Administrator otrzymuję prośbę zmiany hasła</text:p>
            <text:list text:style-name="L33">
              <text:list-item>
                <text:p text:style-name="P125">E-mail z linkiem do zmiany hasła zostaje wysłany przez administratora</text:p>
              </text:list-item>
            </text:list>
            <text:p text:style-name="P55"><text:span text:style-name="T44">2</text:span>b. Administrator <text:span text:style-name="T44">próbuje zmienić hasło</text:span></text:p>
            <text:list text:style-name="L34">
              <text:list-item>
                <text:p text:style-name="P126">Zostaje wyświetlony komunikat o konieczności skontaktowania się z innym administratorem</text:p>
              </text:list-item>
              <text:list-item>
                <text:p text:style-name="P126">Procedura zostaje przerwana</text:p>
              </text:list-item>
            </text:list>
          </table:table-cell>
        </table:table-row>
        <table:table-row>
          <table:table-cell table:style-name="Tabela13.A2" office:value-type="string">
            <text:p text:style-name="P31">Specjalne wymagania</text:p>
          </table:table-cell>
          <table:table-cell table:style-name="Tabela13.B2" office:value-type="string">
            <text:p text:style-name="P50">-</text:p>
          </table:table-cell>
        </table:table-row>
        <table:table-row table:style-name="Tabela13.10">
          <table:table-cell table:style-name="Tabela13.A2" office:value-type="string">
            <text:p text:style-name="P31">Notatki</text:p>
          </table:table-cell>
          <table:table-cell table:style-name="Tabela13.B2" office:value-type="string">
            <text:p text:style-name="P50">-</text:p>
          </table:table-cell>
        </table:table-row>
      </table:table>
      <text:p text:style-name="P30"/>
      <text:p text:style-name="P30"/>
      <text:p text:style-name="P3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31">Nazwa</text:p>
          </table:table-cell>
          <table:table-cell table:style-name="Tabela14.B1" office:value-type="string">
            <text:p text:style-name="P54">Aktualizacja konta</text:p>
          </table:table-cell>
        </table:table-row>
        <table:table-row>
          <table:table-cell table:style-name="Tabela14.A2" office:value-type="string">
            <text:p text:style-name="P31">Numer</text:p>
          </table:table-cell>
          <table:table-cell table:style-name="Tabela14.B2" office:value-type="string">
            <text:p text:style-name="P50">1<text:span text:style-name="T43">4</text:span></text:p>
          </table:table-cell>
        </table:table-row>
        <table:table-row>
          <table:table-cell table:style-name="Tabela14.A2" office:value-type="string">
            <text:p text:style-name="P31">Aktorzy</text:p>
          </table:table-cell>
          <table:table-cell table:style-name="Tabela14.B2" office:value-type="string">
            <text:p text:style-name="P52"><text:span text:style-name="T45">U</text:span>żytkownik</text:p>
          </table:table-cell>
        </table:table-row>
        <table:table-row>
          <table:table-cell table:style-name="Tabela14.A2" office:value-type="string">
            <text:p text:style-name="P31">Krótki opis</text:p>
          </table:table-cell>
          <table:table-cell table:style-name="Tabela14.B2" office:value-type="string">
            <text:p text:style-name="P57">Dane konta użytkownika zostają uaktualnione</text:p>
          </table:table-cell>
        </table:table-row>
        <table:table-row>
          <table:table-cell table:style-name="Tabela14.A2" office:value-type="string">
            <text:p text:style-name="P31">Warunki wstępne</text:p>
          </table:table-cell>
          <table:table-cell table:style-name="Tabela14.B2" office:value-type="string">
            <text:p text:style-name="P52">Konto istnieje</text:p>
          </table:table-cell>
        </table:table-row>
        <table:table-row>
          <table:table-cell table:style-name="Tabela14.A2" office:value-type="string">
            <text:p text:style-name="P31">Warunki końcowe</text:p>
          </table:table-cell>
          <table:table-cell table:style-name="Tabela14.B2" office:value-type="string">
            <text:p text:style-name="P57">Dane zostają pomyślnie uaktualnione</text:p>
          </table:table-cell>
        </table:table-row>
        <table:table-row>
          <table:table-cell table:style-name="Tabela14.A2" office:value-type="string">
            <text:p text:style-name="P31">Główny przepływ zdarzeń</text:p>
          </table:table-cell>
          <table:table-cell table:style-name="Tabela14.B2" office:value-type="string">
            <text:list text:style-name="L35">
              <text:list-item>
                <text:p text:style-name="P105"><text:span text:style-name="T45">Użytkownik</text:span><text:span text:style-name="T41"> loguje się </text:span><text:span text:style-name="T42">na swoje konto</text:span></text:p>
              </text:list-item>
              <text:list-item>
                <text:p text:style-name="P121"><text:span text:style-name="T45">Użytkownik</text:span> wybiera opcję <text:span text:style-name="T45">aktualizacji danych konta</text:span></text:p>
              </text:list-item>
              <text:list-item>
                <text:p text:style-name="P127">Użytkownik wprowadza nowe dane</text:p>
              </text:list-item>
              <text:list-item>
                <text:p text:style-name="P127">Użytkownik potwierdza zmianę danych</text:p>
              </text:list-item>
              <text:list-item>
                <text:p text:style-name="P127">Nowe dane zostają zapisane</text:p>
              </text:list-item>
            </text:list>
          </table:table-cell>
        </table:table-row>
        <table:table-row>
          <table:table-cell table:style-name="Tabela14.A2" office:value-type="string">
            <text:p text:style-name="P31">Alternatywne przepływy <text:span text:style-name="T32">zdarzeń</text:span></text:p>
          </table:table-cell>
          <table:table-cell table:style-name="Tabela14.B2" office:value-type="string">
            <text:p text:style-name="P57">4b. Wprowadzone dane są niepoprawne</text:p>
            <text:list text:style-name="L36">
              <text:list-item>
                <text:p text:style-name="P128">System wyświetli błąd</text:p>
              </text:list-item>
              <text:list-item>
                <text:p text:style-name="P128">Użytkownik zostaje przywrócony do ekranu wpisywania danych</text:p>
              </text:list-item>
            </text:list>
          </table:table-cell>
        </table:table-row>
        <table:table-row>
          <table:table-cell table:style-name="Tabela14.A2" office:value-type="string">
            <text:p text:style-name="P31">Specjalne wymagania</text:p>
          </table:table-cell>
          <table:table-cell table:style-name="Tabela14.B2" office:value-type="string">
            <text:p text:style-name="P50">-</text:p>
          </table:table-cell>
        </table:table-row>
        <table:table-row table:style-name="Tabela14.10">
          <table:table-cell table:style-name="Tabela14.A2" office:value-type="string">
            <text:p text:style-name="P31">Notatki</text:p>
          </table:table-cell>
          <table:table-cell table:style-name="Tabela14.B2" office:value-type="string">
            <text:p text:style-name="P50">-</text:p>
          </table:table-cell>
        </table:table-row>
      </table:table>
      <text:p text:style-name="P30"/>
      <text:p text:style-name="P3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1">Nazwa</text:p>
          </table:table-cell>
          <table:table-cell table:style-name="Tabela12.B1" office:value-type="string">
            <text:p text:style-name="P53">Pobierz listę <text:span text:style-name="T46">przesyłek do transportu</text:span></text:p>
          </table:table-cell>
        </table:table-row>
        <table:table-row>
          <table:table-cell table:style-name="Tabela12.A2" office:value-type="string">
            <text:p text:style-name="P31">Numer</text:p>
          </table:table-cell>
          <table:table-cell table:style-name="Tabela12.B2" office:value-type="string">
            <text:p text:style-name="P50">1<text:span text:style-name="T43">5</text:span></text:p>
          </table:table-cell>
        </table:table-row>
        <table:table-row>
          <table:table-cell table:style-name="Tabela12.A2" office:value-type="string">
            <text:p text:style-name="P31">Aktorzy</text:p>
          </table:table-cell>
          <table:table-cell table:style-name="Tabela12.B2" office:value-type="string">
            <text:p text:style-name="P53">Kurier</text:p>
          </table:table-cell>
        </table:table-row>
        <table:table-row>
          <table:table-cell table:style-name="Tabela12.A2" office:value-type="string">
            <text:p text:style-name="P31">Krótki opis</text:p>
          </table:table-cell>
          <table:table-cell table:style-name="Tabela12.B2" office:value-type="string">
            <text:p text:style-name="P53">Kurier otrzymuje listę przesyłek do <text:span text:style-name="T46">transportu</text:span></text:p>
          </table:table-cell>
        </table:table-row>
        <table:table-row>
          <table:table-cell table:style-name="Tabela12.A2" office:value-type="string">
            <text:p text:style-name="P31">Warunki wstępne</text:p>
          </table:table-cell>
          <table:table-cell table:style-name="Tabela12.B2" office:value-type="string">
            <text:p text:style-name="P53">Kurier posiada konto w systemie</text:p>
          </table:table-cell>
        </table:table-row>
        <table:table-row>
          <table:table-cell table:style-name="Tabela12.A2" office:value-type="string">
            <text:p text:style-name="P31">Warunki końcowe</text:p>
          </table:table-cell>
          <table:table-cell table:style-name="Tabela12.B2" office:value-type="string">
            <text:p text:style-name="P53">Kurier posiada listę przesyłek do <text:span text:style-name="T46">transportu</text:span></text:p>
          </table:table-cell>
        </table:table-row>
        <text:soft-page-break/>
        <table:table-row>
          <table:table-cell table:style-name="Tabela12.A2" office:value-type="string">
            <text:p text:style-name="P31">Główny przepływ zdarzeń</text:p>
          </table:table-cell>
          <table:table-cell table:style-name="Tabela12.B2" office:value-type="string">
            <text:list text:style-name="L37">
              <text:list-item>
                <text:p text:style-name="P106"><text:span text:style-name="T42">Kurier </text:span><text:span text:style-name="T41">loguje się </text:span><text:span text:style-name="T42">na swoje konto</text:span></text:p>
              </text:list-item>
              <text:list-item>
                <text:p text:style-name="P122">System generuje listę przesyłek <text:span text:style-name="T46">do transportu</text:span> dla kuriera</text:p>
              </text:list-item>
              <text:list-item>
                <text:p text:style-name="P129">Lista przesyłek <text:span text:style-name="T46">do transportu</text:span> zostaje wyświetlona kurierowi</text:p>
              </text:list-item>
            </text:list>
          </table:table-cell>
        </table:table-row>
        <table:table-row>
          <table:table-cell table:style-name="Tabela12.A2" office:value-type="string">
            <text:p text:style-name="P31">Alternatywne przepływy <text:span text:style-name="T32">zdarzeń</text:span></text:p>
          </table:table-cell>
          <table:table-cell table:style-name="Tabela12.B2" office:value-type="string">
            <text:p text:style-name="P59">-</text:p>
          </table:table-cell>
        </table:table-row>
        <table:table-row>
          <table:table-cell table:style-name="Tabela12.A2" office:value-type="string">
            <text:p text:style-name="P31">Specjalne wymagania</text:p>
          </table:table-cell>
          <table:table-cell table:style-name="Tabela12.B2" office:value-type="string">
            <text:p text:style-name="P59">Listy przesyłek muszą być generowane <text:span text:style-name="T43">w sposób wyznaczania optymalnych tras dla kuriera</text:span> </text:p>
          </table:table-cell>
        </table:table-row>
        <table:table-row table:style-name="Tabela12.10">
          <table:table-cell table:style-name="Tabela12.A2" office:value-type="string">
            <text:p text:style-name="P31">Notatki</text:p>
          </table:table-cell>
          <table:table-cell table:style-name="Tabela12.B2" office:value-type="string">
            <text:p text:style-name="P58">-</text:p>
          </table:table-cell>
        </table:table-row>
      </table:table>
      <text:p text:style-name="P30"/>
      <text:p text:style-name="P30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31">Nazwa</text:p>
          </table:table-cell>
          <table:table-cell table:style-name="Tabela17.B1" office:value-type="string">
            <text:p text:style-name="P58">Aktualizacja stanu przesyłki</text:p>
          </table:table-cell>
        </table:table-row>
        <table:table-row>
          <table:table-cell table:style-name="Tabela17.A2" office:value-type="string">
            <text:p text:style-name="P31">Numer</text:p>
          </table:table-cell>
          <table:table-cell table:style-name="Tabela17.B2" office:value-type="string">
            <text:p text:style-name="P50">1<text:span text:style-name="T43">6</text:span></text:p>
          </table:table-cell>
        </table:table-row>
        <table:table-row>
          <table:table-cell table:style-name="Tabela17.A2" office:value-type="string">
            <text:p text:style-name="P31">Aktorzy</text:p>
          </table:table-cell>
          <table:table-cell table:style-name="Tabela17.B2" office:value-type="string">
            <text:p text:style-name="P58"><text:span text:style-name="T47">Użytkownik </text:span>lub Sortownia</text:p>
          </table:table-cell>
        </table:table-row>
        <table:table-row>
          <table:table-cell table:style-name="Tabela17.A2" office:value-type="string">
            <text:p text:style-name="P31">Krótki opis</text:p>
          </table:table-cell>
          <table:table-cell table:style-name="Tabela17.B2" office:value-type="string">
            <text:p text:style-name="P60">-</text:p>
          </table:table-cell>
        </table:table-row>
        <table:table-row>
          <table:table-cell table:style-name="Tabela17.A2" office:value-type="string">
            <text:p text:style-name="P31">Warunki wstępne</text:p>
          </table:table-cell>
          <table:table-cell table:style-name="Tabela17.B2" office:value-type="string">
            <text:p text:style-name="P58">Przesyłka istnieje</text:p>
          </table:table-cell>
        </table:table-row>
        <table:table-row>
          <table:table-cell table:style-name="Tabela17.A2" office:value-type="string">
            <text:p text:style-name="P31">Warunki końcowe</text:p>
          </table:table-cell>
          <table:table-cell table:style-name="Tabela17.B2" office:value-type="string">
            <text:p text:style-name="P58">Stan przesyłki w rejestrze został zmieniony</text:p>
          </table:table-cell>
        </table:table-row>
        <table:table-row>
          <table:table-cell table:style-name="Tabela17.A2" office:value-type="string">
            <text:p text:style-name="P31">Główny przepływ zdarzeń</text:p>
          </table:table-cell>
          <table:table-cell table:style-name="Tabela17.B2" office:value-type="string">
            <text:list text:style-name="L38">
              <text:list-item>
                <text:p text:style-name="P130">Wybranie numeru przesyłki</text:p>
              </text:list-item>
              <text:list-item>
                <text:p text:style-name="P130">Wprowadzenie nowego stanu</text:p>
              </text:list-item>
            </text:list>
            <text:p text:style-name="P60"/>
          </table:table-cell>
        </table:table-row>
        <table:table-row>
          <table:table-cell table:style-name="Tabela17.A2" office:value-type="string">
            <text:p text:style-name="P31">Alternatywne przepływy <text:span text:style-name="T32">zdarzeń</text:span></text:p>
          </table:table-cell>
          <table:table-cell table:style-name="Tabela17.B2" office:value-type="string">
            <text:p text:style-name="P60">1b. Wybranie przesyłki poprzez zeskanowanie etykiety</text:p>
            <text:list text:style-name="L39">
              <text:list-item>
                <text:p text:style-name="P131">Zostaje wybrana przesyłka o numerze powiązanym z daną etykietą</text:p>
              </text:list-item>
            </text:list>
            <text:p text:style-name="P60">2a. Nowy stan: Odebrana</text:p>
            <text:p text:style-name="P60">2b. Nowy stan: W trasie</text:p>
            <text:p text:style-name="P60">2c. Nowy stan: Dostarczona</text:p>
            <text:p text:style-name="P60"><text:s text:c="4"/>A. Przesyłka za pobraniem </text:p>
            <text:p text:style-name="P60"><text:s text:c="4"/>B. Przesyłka z potwierdzeniem odbioru</text:p>
            <text:p text:style-name="P60">2d. Nowy stan: W sortowni</text:p>
          </table:table-cell>
        </table:table-row>
        <table:table-row>
          <table:table-cell table:style-name="Tabela17.A2" office:value-type="string">
            <text:p text:style-name="P31">Specjalne wymagania</text:p>
          </table:table-cell>
          <table:table-cell table:style-name="Tabela17.B2" office:value-type="string">
            <text:p text:style-name="P50">-</text:p>
          </table:table-cell>
        </table:table-row>
        <table:table-row table:style-name="Tabela17.10">
          <table:table-cell table:style-name="Tabela17.A2" office:value-type="string">
            <text:p text:style-name="P31">Notatki</text:p>
          </table:table-cell>
          <table:table-cell table:style-name="Tabela17.B2" office:value-type="string">
            <text:p text:style-name="P50">-</text:p>
          </table:table-cell>
        </table:table-row>
      </table:table>
      <text:h text:style-name="P71" text:outline-level="1"><draw:frame draw:style-name="fr3" draw:name="Ramka4" text:anchor-type="char" svg:width="17cm" draw:z-index="2"><draw:text-box fo:min-height="17.083cm"><text:p text:style-name="Diagram"><draw:frame draw:style-name="fr7" draw:name="Obraz3" text:anchor-type="paragraph" svg:width="17cm" style:rel-width="100%" svg:height="17.083cm" style:rel-height="scale" draw:z-index="3"><draw:image xlink:href="Pictures/10000001000003280000032C0B10DB8C.png" xlink:type="simple" xlink:show="embed" xlink:actuate="onLoad" draw:mime-type="image/png"/></draw:frame>Diagram <text:sequence text:ref-name="refDiagram3" text:name="Diagram" text:formula="ooow:Diagram+1" style:num-format="1">4</text:sequence>: Systemowy Diagram Przypadków Użycia</text:p></draw:text-box></draw:frame><text:soft-page-break/><text:span text:style-name="T24"/></text:h>
      <text:h text:style-name="P69" text:outline-level="1"><text:bookmark-start text:name="__RefHeading___Toc46_1083696470"/><text:soft-page-break/>Modelowanie Analityczne SI<text:bookmark-end text:name="__RefHeading___Toc46_1083696470"/></text:h>
      <text:p text:style-name="P77"><draw:frame draw:style-name="fr3" draw:name="Ramka5" text:anchor-type="char" svg:width="17cm" draw:z-index="4"><draw:text-box fo:min-height="9.447cm"><text:p text:style-name="Diagram"><draw:frame draw:style-name="fr6" draw:name="Obraz1 kopia 2" text:anchor-type="paragraph" svg:width="17cm" style:rel-width="100%" svg:height="9.447cm" style:rel-height="scale" draw:z-index="5"><draw:image xlink:href="Pictures/10000001000002CC0000018E71F71248.png" xlink:type="simple" xlink:show="embed" xlink:actuate="onLoad" draw:mime-type="image/png"/></draw:frame>Diagram <text:sequence text:ref-name="refDiagram4" text:name="Diagram" text:formula="ooow:Diagram+1" style:num-format="1">5</text:sequence>: Model Analityczny Nr 1 "Nadaj Przesyłkę"</text:p></draw:text-box></draw:frame></text:p>
      <text:p text:style-name="P77"/>
      <text:p text:style-name="P133"><draw:frame draw:style-name="fr3" draw:name="Ramka6" text:anchor-type="char" svg:width="13.284cm" draw:z-index="6"><draw:text-box fo:min-height="6.535cm"><text:p text:style-name="Diagram"><draw:frame draw:style-name="fr6" draw:name="Obraz2 kopia 1" text:anchor-type="paragraph" svg:width="13.284cm" style:rel-width="100%" svg:height="6.535cm" style:rel-height="scale" draw:z-index="7"><draw:image xlink:href="Pictures/10000001000001F6000000F70058F0D5.png" xlink:type="simple" xlink:show="embed" xlink:actuate="onLoad" draw:mime-type="image/png"/></draw:frame>Diagram <text:sequence text:ref-name="refDiagram5" text:name="Diagram" text:formula="ooow:Diagram+1" style:num-format="1">6</text:sequence>: Model Analityczny Nr 2 "Pobierz Etykietę"</text:p></draw:text-box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p text:style-name="P133"/>
      <text:p text:style-name="P133"><draw:frame draw:style-name="fr4" draw:name="Ramka7" text:anchor-type="char" svg:width="17cm" draw:z-index="8"><draw:text-box fo:min-height="6.69cm"><text:p text:style-name="Diagram"><draw:frame draw:style-name="fr6" draw:name="Obraz3 kopia 1" text:anchor-type="paragraph" svg:width="17cm" style:rel-width="100%" svg:height="6.69cm" style:rel-height="scale" draw:z-index="9"><draw:image xlink:href="Pictures/10000001000002CF0000011BA2E60FD2.png" xlink:type="simple" xlink:show="embed" xlink:actuate="onLoad" draw:mime-type="image/png"/></draw:frame>Diagram <text:sequence text:ref-name="refDiagram6" text:name="Diagram" text:formula="ooow:Diagram+1" style:num-format="1">7</text:sequence>: Model Analityczny Nr 3 "Wysłanie Wniosku O Założenie Konta Stałego Nadawcy"</text:p></draw:text-box></draw:frame></text:p>
      <text:p text:style-name="P133"><draw:frame draw:style-name="fr3" draw:name="Ramka8" text:anchor-type="char" svg:width="17cm" draw:z-index="10"><draw:text-box fo:min-height="9.387cm"><text:p text:style-name="Diagram"><draw:frame draw:style-name="fr6" draw:name="Obraz4" text:anchor-type="paragraph" svg:width="17cm" style:rel-width="100%" svg:height="9.387cm" style:rel-height="scale" draw:z-index="11"><draw:image xlink:href="Pictures/100000010000028C00000168DC5D3339.png" xlink:type="simple" xlink:show="embed" xlink:actuate="onLoad" draw:mime-type="image/png"/></draw:frame>Diagram <text:sequence text:ref-name="refDiagram7" text:name="Diagram" text:formula="ooow:Diagram+1" style:num-format="1">8</text:sequence>: Model Analityczny Nr 4 "Anuluj Przesyłkę"</text:p></draw:text-box></draw:frame></text:p>
      <text:p text:style-name="P133"/>
      <text:p text:style-name="P133"/>
      <text:p text:style-name="P133"/>
      <text:p text:style-name="P133"/>
      <text:p text:style-name="P133"/>
      <text:p text:style-name="P133"><draw:frame draw:style-name="fr3" draw:name="Ramka9" text:anchor-type="char" svg:width="13.231cm" draw:z-index="12"><draw:text-box fo:min-height="5.503cm"><text:p text:style-name="Diagram"><draw:frame draw:style-name="fr6" draw:name="Obraz5" text:anchor-type="paragraph" svg:width="13.231cm" style:rel-width="100%" svg:height="5.503cm" style:rel-height="scale" draw:z-index="13"><draw:image xlink:href="Pictures/10000001000001F4000000D074F58F28.png" xlink:type="simple" xlink:show="embed" xlink:actuate="onLoad" draw:mime-type="image/png"/></draw:frame>Diagram <text:sequence text:ref-name="refDiagram8" text:name="Diagram" text:formula="ooow:Diagram+1" style:num-format="1">9</text:sequence>: Model Analityczny Nr 5 "Lokalizacja Przesyłki"</text:p></draw:text-box></draw:frame><text:soft-page-break/></text:p>
      <text:p text:style-name="P133"><draw:frame draw:style-name="fr3" draw:name="Ramka10" text:anchor-type="char" svg:width="17cm" draw:z-index="30"><draw:text-box fo:min-height="8.548cm"><text:p text:style-name="Diagram"><draw:frame draw:style-name="fr6" draw:name="Obraz14" text:anchor-type="paragraph" svg:width="17cm" style:rel-width="100%" svg:height="8.548cm" style:rel-height="scale" draw:z-index="31"><draw:image xlink:href="Pictures/1000000100000424000002153C9839EB.png" xlink:type="simple" xlink:show="embed" xlink:actuate="onLoad" draw:mime-type="image/png"/></draw:frame>Diagram <text:sequence text:ref-name="refDiagram9" text:name="Diagram" text:formula="ooow:Diagram+1" style:num-format="1">10</text:sequence>: Model Analityczny Nr 6 "Żądanie Zwrotu"</text:p></draw:text-box></draw:frame></text:p>
      <text:p text:style-name="P133"><draw:frame draw:style-name="fr3" draw:name="Ramka11" text:anchor-type="char" svg:width="14.183cm" draw:z-index="14"><draw:text-box fo:min-height="4.128cm"><text:p text:style-name="Diagram"><draw:frame draw:style-name="fr6" draw:name="Obraz6" text:anchor-type="paragraph" svg:width="14.183cm" style:rel-width="100%" svg:height="4.128cm" style:rel-height="scale" draw:z-index="15"><draw:image xlink:href="Pictures/10000001000002180000009C70CA151F.png" xlink:type="simple" xlink:show="embed" xlink:actuate="onLoad" draw:mime-type="image/png"/></draw:frame>Diagram <text:sequence text:ref-name="refDiagram10" text:name="Diagram" text:formula="ooow:Diagram+1" style:num-format="1">11</text:sequence>: Model Analityczny Nr 7 "Logowanie"</text:p></draw:text-box></draw:frame></text:p>
      <text:p text:style-name="P133"/>
      <text:p text:style-name="P133"/>
      <text:p text:style-name="P133"><text:soft-page-break/></text:p>
      <text:p text:style-name="P133"><draw:frame draw:style-name="fr3" draw:name="Ramka12" text:anchor-type="char" svg:width="17cm" draw:z-index="32"><draw:text-box fo:min-height="11.104cm"><text:p text:style-name="Diagram"><draw:frame draw:style-name="fr6" draw:name="Obraz15" text:anchor-type="paragraph" svg:width="17cm" style:rel-width="100%" svg:height="11.104cm" style:rel-height="scale" draw:z-index="33"><draw:image xlink:href="Pictures/10000001000003950000025794DB9A75.png" xlink:type="simple" xlink:show="embed" xlink:actuate="onLoad" draw:mime-type="image/png"/></draw:frame>Diagram <text:sequence text:ref-name="refDiagram11" text:name="Diagram" text:formula="ooow:Diagram+1" style:num-format="1">12</text:sequence>: Model Analityczny Nr 8 "Akceptacja Zwrotu"</text:p></draw:text-box></draw:frame></text:p>
      <text:p text:style-name="P133"><draw:frame draw:style-name="fr3" draw:name="Ramka13" text:anchor-type="char" svg:width="17cm" draw:z-index="34"><draw:text-box fo:min-height="8.668cm"><text:p text:style-name="Diagram"><draw:frame draw:style-name="fr6" draw:name="Obraz16" text:anchor-type="paragraph" svg:width="17cm" style:rel-width="100%" svg:height="8.668cm" style:rel-height="scale" draw:z-index="35"><draw:image xlink:href="Pictures/100000010000038A000001CE3E5D7AFC.png" xlink:type="simple" xlink:show="embed" xlink:actuate="onLoad" draw:mime-type="image/png"/></draw:frame>Diagram <text:sequence text:ref-name="refDiagram12" text:name="Diagram" text:formula="ooow:Diagram+1" style:num-format="1">13</text:sequence>: Model Analityczny Nr 9 "Odmowa Zwrotu"</text:p></draw:text-box></draw:frame></text:p>
      <text:p text:style-name="P133"/>
      <text:p text:style-name="P133"><draw:frame draw:style-name="fr3" draw:name="Ramka14" text:anchor-type="char" svg:width="13.125cm" draw:z-index="16"><draw:text-box fo:min-height="8.414cm"><text:p text:style-name="Diagram"><draw:frame draw:style-name="fr6" draw:name="Obraz7" text:anchor-type="paragraph" svg:width="13.125cm" style:rel-width="100%" svg:height="8.414cm" style:rel-height="scale" draw:z-index="17"><draw:image xlink:href="Pictures/10000001000001F00000013EAF96B871.png" xlink:type="simple" xlink:show="embed" xlink:actuate="onLoad" draw:mime-type="image/png"/></draw:frame>Diagram <text:sequence text:ref-name="refDiagram13" text:name="Diagram" text:formula="ooow:Diagram+1" style:num-format="1">14</text:sequence>: Model Analityczny Nr 10 "Wyświetlenie Listy Zwrotów"</text:p></draw:text-box></draw:frame><text:soft-page-break/></text:p>
      <text:p text:style-name="P133"><draw:frame draw:style-name="fr3" draw:name="Ramka15" text:anchor-type="char" svg:width="17cm" draw:z-index="18"><draw:text-box fo:min-height="8.59cm"><text:p text:style-name="Diagram"><draw:frame draw:style-name="fr6" draw:name="Obraz8" text:anchor-type="paragraph" svg:width="17cm" style:rel-width="100%" svg:height="8.59cm" style:rel-height="scale" draw:z-index="19"><draw:image xlink:href="Pictures/1000000100000339000001A1B53C8E30.png" xlink:type="simple" xlink:show="embed" xlink:actuate="onLoad" draw:mime-type="image/png"/></draw:frame>Diagram <text:sequence text:ref-name="refDiagram14" text:name="Diagram" text:formula="ooow:Diagram+1" style:num-format="1">15</text:sequence>: Model Analityczny Nr 11 "Stworzenie Konta"</text:p></draw:text-box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p text:style-name="P133"><draw:frame draw:style-name="fr3" draw:name="Ramka16" text:anchor-type="char" svg:width="16.485cm" draw:z-index="20"><draw:text-box fo:min-height="6.191cm"><text:p text:style-name="Diagram"><draw:frame draw:style-name="fr6" draw:name="Obraz9" text:anchor-type="paragraph" svg:width="16.485cm" style:rel-width="100%" svg:height="6.191cm" style:rel-height="scale" draw:z-index="21"><draw:image xlink:href="Pictures/100000010000026F000000EA71BBA80D.png" xlink:type="simple" xlink:show="embed" xlink:actuate="onLoad" draw:mime-type="image/png"/></draw:frame>Diagram <text:sequence text:ref-name="refDiagram15" text:name="Diagram" text:formula="ooow:Diagram+1" style:num-format="1">16</text:sequence>: Model Analityczny Nr 12 "Usuwanie Konta"</text:p></draw:text-box></draw:frame></text:p>
      <text:p text:style-name="P133"><draw:frame draw:style-name="fr3" draw:name="Ramka17" text:anchor-type="char" svg:width="17cm" draw:z-index="22"><draw:text-box fo:min-height="6.916cm"><text:p text:style-name="Diagram"><draw:frame draw:style-name="fr6" draw:name="Obraz10" text:anchor-type="paragraph" svg:width="17cm" style:rel-width="100%" svg:height="6.916cm" style:rel-height="scale" draw:z-index="23"><draw:image xlink:href="Pictures/100000010000034100000153B14264D6.png" xlink:type="simple" xlink:show="embed" xlink:actuate="onLoad" draw:mime-type="image/png"/></draw:frame>Diagram <text:sequence text:ref-name="refDiagram16" text:name="Diagram" text:formula="ooow:Diagram+1" style:num-format="1">17</text:sequence>: Model Analityczny Nr 13 "Zmiana Hasła"</text:p></draw:text-box></draw:frame></text:p>
      <text:p text:style-name="P133"><draw:frame draw:style-name="fr3" draw:name="Ramka18" text:anchor-type="char" svg:width="12.728cm" draw:z-index="24"><draw:text-box fo:min-height="6.244cm"><text:p text:style-name="Diagram"><draw:frame draw:style-name="fr6" draw:name="Obraz11" text:anchor-type="paragraph" svg:width="12.728cm" style:rel-width="100%" svg:height="6.244cm" style:rel-height="scale" draw:z-index="25"><draw:image xlink:href="Pictures/10000001000001E1000000ECDCBF93C2.png" xlink:type="simple" xlink:show="embed" xlink:actuate="onLoad" draw:mime-type="image/png"/></draw:frame>Diagram <text:sequence text:ref-name="refDiagram17" text:name="Diagram" text:formula="ooow:Diagram+1" style:num-format="1">18</text:sequence>: Model Analityczny Nr 14 "Aktualizacja Konta"</text:p></draw:text-box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draw:frame draw:style-name="fr3" draw:name="Ramka19" text:anchor-type="char" svg:width="15.665cm" draw:z-index="26"><draw:text-box fo:min-height="6.535cm"><text:p text:style-name="Diagram"><draw:frame draw:style-name="fr6" draw:name="Obraz12" text:anchor-type="paragraph" svg:width="15.665cm" style:rel-width="100%" svg:height="6.535cm" style:rel-height="scale" draw:z-index="27"><draw:image xlink:href="Pictures/1000000100000250000000F7CCA5C8B4.png" xlink:type="simple" xlink:show="embed" xlink:actuate="onLoad" draw:mime-type="image/png"/></draw:frame>Diagram <text:sequence text:ref-name="refDiagram18" text:name="Diagram" text:formula="ooow:Diagram+1" style:num-format="1">19</text:sequence>: Model Analityczny Nr 15 "Pobranie Listy Przesyłek Do Transportu"</text:p></draw:text-box></draw:frame><text:soft-page-break/></text:p>
      <text:p text:style-name="P133"><draw:frame draw:style-name="fr3" draw:name="Ramka20" text:anchor-type="char" svg:width="16.459cm" draw:z-index="28"><draw:text-box fo:min-height="8.363cm"><text:p text:style-name="Diagram"><draw:frame draw:style-name="fr6" draw:name="Obraz13" text:anchor-type="paragraph" svg:width="16.459cm" style:rel-width="100%" svg:height="8.363cm" style:rel-height="scale" draw:z-index="29"><draw:image xlink:href="Pictures/100000010000026E0000013C05B55FFE.png" xlink:type="simple" xlink:show="embed" xlink:actuate="onLoad" draw:mime-type="image/png"/></draw:frame>Diagram <text:sequence text:ref-name="refDiagram19" text:name="Diagram" text:formula="ooow:Diagram+1" style:num-format="1">20</text:sequence>: Model Analityczny Nr 16 "Aktualizacja Stanu Przesyłki"</text:p></draw:text-box></draw:frame><text:span text:style-name="T24"/></text:p>
      <text:h text:style-name="P68" text:outline-level="1"><text:bookmark-start text:name="__RefHeading___Toc48_1083696470"/><text:soft-page-break/>Modelowanie Danych<text:bookmark-end text:name="__RefHeading___Toc48_1083696470"/></text:h>
      <text:p text:style-name="P132"><draw:frame draw:style-name="fr3" draw:name="Ramka21" text:anchor-type="char" svg:width="17.803cm" draw:z-index="36"><draw:text-box fo:min-height="15cm"><text:p text:style-name="Diagram"><draw:frame draw:style-name="fr6" draw:name="Obraz17" text:anchor-type="paragraph" svg:width="17.849cm" style:rel-width="105%" svg:height="14.302cm" style:rel-height="scale" draw:z-index="37"><draw:image xlink:href="Pictures/10000001000005C50000044F85045596.png" xlink:type="simple" xlink:show="embed" xlink:actuate="onLoad" draw:mime-type="image/png"/></draw:frame>Diagram <text:sequence text:ref-name="refDiagram20" text:name="Diagram" text:formula="ooow:Diagram+1" style:num-format="1">21</text:sequence>: Konceptualny Diagram Klas</text:p></draw:text-box></draw:frame><text:span text:style-name="T24"/></text:p>
      <text:h text:style-name="P68" text:outline-level="1"><text:bookmark-start text:name="__RefHeading___Toc50_1083696470"/>Projektowanie Danych<text:bookmark-end text:name="__RefHeading___Toc50_1083696470"/></text:h>
      <text:h text:style-name="P68" text:outline-level="1"><text:bookmark-start text:name="__RefHeading___Toc52_1083696470"/>Projektowanie Interfejsu Użytkownika<text:bookmark-end text:name="__RefHeading___Toc52_1083696470"/></text:h>
      <text:h text:style-name="P68" text:outline-level="1"><text:bookmark-start text:name="__RefHeading___Toc54_1083696470"/>Modelowanie Dynamiki SI<text:bookmark-end text:name="__RefHeading___Toc54_1083696470"/></text:h>
      <text:h text:style-name="P68" text:outline-level="1"><text:bookmark-start text:name="__RefHeading___Toc56_1083696470"/>Praca Zespołowa<text:bookmark-end text:name="__RefHeading___Toc56_1083696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iagram" style:family="paragraph" style:parent-style-name="Caption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libri" fo:font-size="8pt" officeooo:rsid="00008545" officeooo:paragraph-rsid="0000854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rma Kurierska, Wiktor Stankiewicz Maciej Wojciechowski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0T21:10:24.033000000</meta:creation-date>
    <dc:date>2026-05-24T15:55:55.965000000</dc:date>
    <meta:editing-duration>PT2H12M26S</meta:editing-duration>
    <meta:editing-cycles>29</meta:editing-cycles>
    <meta:generator>LibreOffice/24.2.0.3$Windows_X86_64 LibreOffice_project/da48488a73ddd66ea24cf16bbc4f7b9c08e9bea1</meta:generator>
    <meta:document-statistic meta:table-count="17" meta:image-count="21" meta:object-count="0" meta:page-count="23" meta:paragraph-count="562" meta:word-count="2776" meta:character-count="19570" meta:non-whitespace-character-count="17437"/>
  </office:meta>
</office:document-meta>
</file>